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BD9B888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miscShapeWipe" smil:subtype="topRight"/>
    </style:style>
    <style:style style:name="dp4" style:family="drawing-page">
      <style:drawing-page-properties presentation:background-visible="true" presentation:background-objects-visible="true" presentation:display-footer="true" presentation:display-page-number="true" presentation:display-date-time="true" smil:type="miscShapeWipe" smil:subtype="heart"/>
    </style:style>
    <style:style style:name="gr1"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3" style:family="graphic" style:parent-style-name="standard">
      <style:graphic-properties draw:stroke="solid" svg:stroke-width="0.1cm" svg:stroke-color="#000000" draw:marker-start="" draw:marker-start-width="0.41cm" draw:marker-start-center="false" draw:marker-end="" draw:marker-end-width="0.41cm" draw:marker-end-center="false" draw:stroke-linejoin="miter" draw:fill="solid" draw:fill-color="#00acc1" style:repeat="repeat" draw:textarea-horizontal-align="center" draw:textarea-vertical-align="middle" draw:auto-grow-height="false" draw:fit-to-size="false" style:shrink-to-fit="false" fo:min-height="7.922cm" fo:min-width="16.482cm" fo:padding-top="0.167cm" fo:padding-bottom="0.167cm" fo:padding-left="0.286cm" fo:padding-right="0.286cm" fo:wrap-option="wrap" draw:shadow="visible" draw:shadow-offset-x="0cm" draw:shadow-offset-y="0.282cm" draw:shadow-color="#000000"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in-height="10.128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8" style:family="graphic" style:parent-style-name="standard">
      <style:graphic-properties draw:textarea-horizontal-align="justify" draw:textarea-vertical-align="middle" draw:auto-grow-height="false" fo:min-height="9.275cm" fo:min-width="12.2cm" style:writing-mode="lr-tb"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771cm" loext:decorative="false"/>
      <style:paragraph-properties style:writing-mode="lr-tb"/>
    </style:style>
    <style:style style:name="gr10" style:family="graphic" style:parent-style-name="standard">
      <style:graphic-properties draw:textarea-horizontal-align="justify" draw:textarea-vertical-align="middle" draw:auto-grow-height="false" fo:min-height="10.064cm" fo:min-width="18.704cm" loext:decorative="false"/>
    </style:style>
    <style:style style:name="pr1" style:family="presentation" style:parent-style-name="Sunset-title">
      <style:graphic-properties draw:auto-grow-height="true" fo:min-height="8.472cm" loext:decorative="false"/>
      <style:paragraph-properties style:writing-mode="lr-tb"/>
    </style:style>
    <style:style style:name="pr2" style:family="presentation" style:parent-style-name="Sunset-notes">
      <style:graphic-properties draw:fill-color="#ffffff" fo:min-height="14cm" loext:decorative="false"/>
      <style:paragraph-properties style:writing-mode="lr-tb"/>
    </style:style>
    <style:style style:name="pr3" style:family="presentation" style:parent-style-name="Sunset-title">
      <style:graphic-properties draw:auto-grow-height="true" fo:min-height="2.5cm" loext:decorative="false"/>
      <style:paragraph-properties style:writing-mode="lr-tb"/>
    </style:style>
    <style:style style:name="pr4" style:family="presentation" style:parent-style-name="Sunset-outline1">
      <style:graphic-properties fo:min-height="9.75cm" loext:decorative="false"/>
      <style:paragraph-properties style:writing-mode="lr-tb"/>
    </style:style>
    <style:style style:name="P1" style:family="paragraph">
      <style:text-properties fo:font-size="73pt" style:font-size-asian="73pt" style:font-size-complex="73pt"/>
    </style:style>
    <style:style style:name="P2" style:family="paragraph">
      <loext:graphic-properties draw:fill="none" draw:fill-color="#ffffff"/>
      <style:text-properties style:font-name="Comic Sans MS"/>
    </style:style>
    <style:style style:name="P3"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4" style:family="paragraph">
      <loext:graphic-properties draw:fill="solid" draw:fill-color="#00acc1"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5" style:family="paragraph">
      <loext:graphic-properties draw:fill-color="#ffffff"/>
      <style:text-properties fo:font-size="20pt"/>
    </style:style>
    <style:style style:name="P6" style:family="paragraph">
      <style:text-properties fo:color="#000000" loext:opacity="100%" fo:font-weight="bold" fo:background-color="transparent" style:font-weight-asian="bold" style:font-weight-complex="bold"/>
    </style:style>
    <style:style style:name="P7" style:family="paragraph">
      <loext:graphic-properties draw:fill="none" draw:fill-color="#ffffff"/>
      <style:text-properties fo:color="#000000" loext:opacity="100%" style:font-name="Fira Code" fo:font-size="16pt" fo:font-weight="bold" fo:background-color="transparent" style:font-size-asian="16pt" style:font-weight-asian="bold" style:font-size-complex="16pt" style:font-weight-complex="bold"/>
    </style:style>
    <style:style style:name="P8" style:family="paragraph">
      <style:text-properties style:font-name="Comic Sans MS"/>
    </style:style>
    <style:style style:name="P9" style:family="paragraph">
      <loext:graphic-properties draw:fill="none" draw:fill-color="#ffffff"/>
    </style:style>
    <style:style style:name="P10" style:family="paragraph">
      <loext:graphic-properties draw:fill="none" draw:fill-color="#ffffff"/>
      <style:text-properties style:font-name="Comic Sans MS" fo:font-size="21pt" style:font-size-asian="21pt" style:font-size-complex="21pt"/>
    </style:style>
    <style:style style:name="P11" style:family="paragraph">
      <style:paragraph-properties fo:text-align="center"/>
    </style:style>
    <style:style style:name="P12" style:family="paragraph">
      <style:paragraph-properties fo:text-align="center" style:writing-mode="lr-tb"/>
    </style:style>
    <style:style style:name="P13" style:family="paragraph">
      <loext:graphic-properties draw:fill-color="#ffffff"/>
    </style:style>
    <style:style style:name="T1" style:family="text">
      <style:text-properties style:font-name="Comic Sans MS"/>
    </style:style>
    <style:style style:name="T2" style:family="text">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T3" style:family="text">
      <style:text-properties fo:color="#000000" loext:opacity="100%" style:font-name="Fira Code" fo:font-size="16pt" fo:font-weight="bold" fo:background-color="transparent" style:font-size-asian="16pt" style:font-weight-asian="bold" style:font-size-complex="16pt" style:font-weight-complex="bold"/>
    </style:style>
    <style:style style:name="T4" style:family="text">
      <style:text-properties style:font-name="Comic Sans MS" fo:font-size="21pt" style:font-size-asian="21pt" style:font-size-complex="21pt"/>
    </style:style>
    <style:style style:name="T5" style:family="text">
      <style:text-properties style:font-name="Comic Sans M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0">
        <office:forms form:automatic-focus="false" form:apply-design-mode="false"/>
        <draw:frame presentation:style-name="pr1" draw:text-style-name="P1" draw:layer="layout" svg:width="13.703cm" svg:height="8.472cm" svg:x="9.525cm" svg:y="-0.852cm" presentation:class="title" presentation:placeholder="true" presentation:user-transformed="true">
          <draw:text-box/>
        </draw:frame>
        <draw:frame draw:style-name="gr1" draw:text-style-name="P2" draw:layer="layout" svg:width="13.97cm" svg:height="3.175cm" svg:x="17.78cm" svg:y="12.065cm">
          <draw:text-box>
            <text:p><text:span text:style-name="T1">Campus du libre 2024</text:span></text:p>
          </draw:text-box>
        </draw:frame>
        <draw:frame draw:style-name="gr2" draw:text-style-name="P2" draw:layer="layout" svg:width="8.89cm" svg:height="1.27cm" svg:x="2.54cm" svg:y="12.7cm">
          <draw:text-box>
            <text:p><text:span text:style-name="T1">Paul-Elliot Anglès d’Auriac</text:span></text:p>
          </draw:text-box>
        </draw:frame>
        <draw:custom-shape draw:style-name="gr3" draw:text-style-name="P4" draw:layer="layout" svg:width="17.053cm" svg:height="8.255cm" svg:x="5.807cm" svg:y="3.81cm">
          <text:p text:style-name="P3"><text:span text:style-name="T2">Slipshow</text:span></text:p>
          <draw:enhanced-geometry svg:viewBox="0 0 21600 21600" draw:mirror-horizontal="false" draw:mirror-vertical="false" draw:text-path="true" draw:text-path-mode="shape" draw:text-path-scale="path" draw:text-path-same-letter-heights="false" draw:extrusion="false" draw:extrusion-rotation-angle="40 0" draw:extrusion-viewpoint="(0cm 0cm 25cm)" draw:extrusion-origin="0 0" draw:extrusion-skew="0 0" draw:extrusion-first-light-direction="(50000 -50000 10000)" draw:extrusion-second-light-direction="(-50000 0 10000)" draw:extrusion-brightness="15%" draw:extrusion-light-face="true" draw:extrusion-first-light-harsh="true" draw:extrusion-second-light-harsh="false" draw:extrusion-second-light-level="37%" draw:extrusion-depth="0cm 0" dr3d:projection="perspective" dr3d:shade-mode="flat" draw:extrusion-metal="true" draw:extrusion-diffusion="122%" draw:extrusion-first-light-level="67%" loext:extrusion-specularity-loext="122%" draw:extrusion-specularity="100%" draw:glue-points="?f18 ?f0 ?f20 10800 ?f19 ?f1 ?f21 10800" draw:text-areas="0 0 21600 21600" draw:type="fontwork-wave" draw:modifiers="140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draw:page-thumbnail draw:style-name="gr4"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3" draw:master-page-name="Sunset" presentation:presentation-page-layout-name="AL2T1" xml:id="id1" draw:id="id1">
        <office:forms form:automatic-focus="false" form:apply-design-mode="false"/>
        <draw:frame draw:style-name="gr5" draw:text-style-name="P7" draw:layer="layout" svg:width="12.065cm" svg:height="10.378cm" svg:x="13.97cm" svg:y="9.525cm">
          <draw:text-box>
            <text:p xml:id="id8" text:id="id8" text:style-name="P6"><text:span text:style-name="T3"># Ceci est un titre</text:span></text:p>
            <text:p text:style-name="P6"><text:span text:style-name="T3"/></text:p>
            <text:p xml:id="id9" text:id="id9" text:style-name="P6"><text:span text:style-name="T3">Et ceci est un paragraphe.</text:span></text:p>
            <text:p text:style-name="P6"><text:span text:style-name="T3"/></text:p>
            <text:p xml:id="id10" text:id="id10" text:style-name="P6"><text:span text:style-name="T3">- Et ceci est une liste à points</text:span></text:p>
            <text:p xml:id="id11" text:id="id11" text:style-name="P6"><text:span text:style-name="T3">- Avec plusieurs points</text:span></text:p>
            <text:p text:style-name="P6"><text:span text:style-name="T3"/></text:p>
            <text:p xml:id="id12" text:id="id12" text:style-name="P6"><text:span text:style-name="T3">On peut aussi mettre du texte en gras, comme dans l’exemple : **comme ceci**.</text:span></text:p>
            <text:p xml:id="id13" text:id="id13" text:style-name="P6"><text:span text:style-name="T3">L’italique a _aussi_ une syntaxe.</text:span></text:p>
          </draw:text-box>
        </draw:frame>
        <draw:frame presentation:style-name="pr3" draw:text-style-name="P8" draw:layer="layout" svg:width="10cm" svg:height="2.5cm" svg:x="7.78cm" svg:y="0.675cm" presentation:class="title" presentation:user-transformed="true">
          <draw:text-box>
            <text:p xml:id="id14" text:id="id14"><text:span text:style-name="T1">Slipshow</text:span></text:p>
          </draw:text-box>
        </draw:frame>
        <draw:frame presentation:style-name="pr4" draw:text-style-name="P8" draw:layer="layout" svg:width="30.52cm" svg:height="1.715cm" svg:x="2.04cm" svg:y="4cm" presentation:class="outline" presentation:user-transformed="true">
          <draw:text-box>
            <text:list text:style-name="L3">
              <text:list-item>
                <text:p xml:id="id2" text:id="id2"><text:span text:style-name="T1">Slipshow est un logiciel libre pour faire des présentations améliorées</text:span></text:p>
                <text:p><text:span text:style-name="T1"/></text:p>
              </text:list-item>
            </text:list>
          </draw:text-box>
        </draw:frame>
        <draw:frame draw:style-name="gr6" draw:text-style-name="P2" draw:layer="layout" svg:width="22.225cm" svg:height="2.54cm" svg:x="1.905cm" svg:y="5.08cm">
          <draw:text-box>
            <text:p xml:id="id3" text:id="id3"><text:span text:style-name="T1">- Avec slipshow, pas besoin de gérer l’alignement du texte !</text:span></text:p>
          </draw:text-box>
        </draw:frame>
        <draw:frame draw:style-name="gr6" draw:text-style-name="P9" draw:layer="layout" svg:width="17.78cm" svg:height="2.54cm" svg:x="3.175cm" svg:y="6.35cm">
          <draw:text-box>
            <text:p xml:id="id4" text:id="id4">- &lt;Incorrect Libreoffice version: unsupported block&gt;</text:p>
          </draw:text-box>
        </draw:frame>
        <draw:frame draw:style-name="gr7" draw:text-style-name="P10" draw:layer="layout" svg:width="19.05cm" svg:height="6.35cm" svg:x="2.54cm" svg:y="7.62cm">
          <draw:text-box>
            <text:p xml:id="id6" text:id="id6"><text:span text:style-name="T4">Une présentation slipshow est écrite </text:span><text:span text:style-name="T5">dans un fichier texte.</text:span></text:p>
          </draw:text-box>
        </draw:frame>
        <draw:custom-shape draw:style-name="gr8" draw:text-style-name="P12" xml:id="id5" draw:id="id5" draw:layer="layout" svg:width="12.7cm" svg:height="9.525cm" svg:x="13.335cm" svg:y="7.62cm">
          <text:p text:style-name="P11"/>
          <draw:enhanced-geometry svg:viewBox="0 0 21600 21600" draw:type="rectangle" draw:enhanced-path="M 0 0 L 21600 0 21600 21600 0 21600 0 0 Z N"/>
        </draw:custom-shape>
        <draw:frame draw:style-name="gr9" draw:text-style-name="P2" draw:layer="layout" svg:width="11.43cm" svg:height="2.021cm" svg:x="13.97cm" svg:y="8.255cm">
          <draw:text-box>
            <text:p xml:id="id7" text:id="id7"><text:span text:style-name="T1">Exemple:</text:span></text:p>
            <text:p><text:span text:style-name="T1"/></text:p>
          </draw:text-box>
        </draw:frame>
        <anim:par presentation:node-type="timing-root">
          <anim:par smil:begin="id1.begin">
            <anim:transitionFilter smil:dur="2s" smil:type="miscShapeWipe" smil:subtype="topRigh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anim:par smil:begin="0s">
                <anim:par smil:begin="0s" smil:fill="hold" presentation:node-type="on-click" presentation:preset-class="entrance" presentation:preset-id="ooo-entrance-bounce">
                  <anim:set smil:begin="0s" smil:dur="0.00125s" smil:fill="hold" smil:targetElement="id3" anim:sub-item="text" smil:attributeName="visibility" smil:to="visible"/>
                  <anim:transitionFilter smil:begin="0s" smil:dur="0.725s" smil:targetElement="id3" anim:sub-item="text" smil:type="barWipe" smil:subtype="topToBottom"/>
                  <anim:animate smil:begin="0s" smil:dur="2.2775s" smil:targetElement="id3" anim:sub-item="text" smil:attributeName="x" smil:values="x-0.25;x" smil:keyTimes="0;1" smil:keySplines="0,0;0.14,0.36;0.43,0.73;0.71,0.91;1,1"/>
                  <anim:animate smil:begin="0s" smil:dur="0.83s" smil:targetElement="id3" anim:sub-item="text" smil:attributeName="y" smil:values="0.5;1" smil:keyTimes="0;1" anim:formula="y-sin(pi*$)/3" smil:keySplines="0,0;0.25,0.07;0.5,0.2;0.75,0.467;1,1"/>
                  <anim:animate smil:begin="0.83s" smil:dur="0.83s" smil:targetElement="id3" anim:sub-item="text" smil:attributeName="y" smil:values="0;1" smil:keyTimes="0;1" anim:formula="y-sin(pi*$)/9" smil:keySplines="0,0;0.125,0.2665;0.25,0.4;0.375,0.465;0.5,0.5;0.625,0.535;0.75,0.6;0.875,0.7335;1,1"/>
                  <anim:animate smil:begin="1.655s" smil:dur="0.415s" smil:targetElement="id3" anim:sub-item="text" smil:attributeName="y" smil:values="0;1" smil:keyTimes="0;1" anim:formula="y-sin(pi*$)/27" smil:keySplines="0,0;0.125,0.2665;0.25,0.4;0.375,0.465;0.5,0.5;0.625,0.535;0.75,0.6;0.875,0.7335;1,1"/>
                  <anim:animate smil:begin="2.07s" smil:dur="0.205s" smil:targetElement="id3" anim:sub-item="text" smil:attributeName="y" smil:values="0;1" smil:keyTimes="0;1" anim:formula="y-sin(pi*$)/81" smil:keySplines="0,0;0.125,0.2665;0.25,0.4;0.375,0.465;0.5,0.5;0.625,0.535;0.75,0.6;0.875,0.7335;1,1"/>
                  <anim:animateTransform smil:begin="0.8125s" smil:dur="0.0325s" smil:targetElement="id3" anim:sub-item="text" smil:to="1,0.6" smil:attributeName="transform" svg:type="scale"/>
                  <anim:animateTransform smil:begin="0.845s" smil:dur="0.2075s" smil:decelerate="0.5" smil:targetElement="id3" anim:sub-item="text" smil:to="1,1" smil:attributeName="transform" svg:type="scale"/>
                  <anim:animateTransform smil:begin="1.64s" smil:dur="0.0325s" smil:targetElement="id3" anim:sub-item="text" smil:to="1,0.8" smil:attributeName="transform" svg:type="scale"/>
                  <anim:animateTransform smil:begin="1.6725s" smil:dur="0.2075s" smil:decelerate="0.5" smil:targetElement="id3" anim:sub-item="text" smil:to="1,1" smil:attributeName="transform" svg:type="scale"/>
                  <anim:animateTransform smil:begin="2.0525s" smil:dur="0.0325s" smil:targetElement="id3" anim:sub-item="text" smil:to="1,0.9" smil:attributeName="transform" svg:type="scale"/>
                  <anim:animateTransform smil:begin="2.085s" smil:dur="0.2075s" smil:decelerate="0.5" smil:targetElement="id3" anim:sub-item="text" smil:to="1,1" smil:attributeName="transform" svg:type="scale"/>
                  <anim:animateTransform smil:begin="2.26s" smil:dur="0.0325s" smil:targetElement="id3" anim:sub-item="text" smil:to="1,0.95" smil:attributeName="transform" svg:type="scale"/>
                  <anim:animateTransform smil:begin="2.2925s" smil:dur="0.2075s" smil:decelerate="0.5" smil:targetElement="id3" anim:sub-item="text" smil:to="1,1" smil:attributeName="transform" svg:type="scale"/>
                </anim:par>
              </anim:par>
            </anim:par>
            <anim:par smil:begin="next">
              <anim:par smil:begin="0s">
                <anim:par smil:begin="0s" smil:fill="hold" presentation:node-type="on-click" presentation:preset-class="entrance" presentation:preset-id="ooo-entrance-breaks">
                  <anim:set smil:begin="0s" smil:dur="0.001s" smil:fill="hold" smil:targetElement="id4" anim:sub-item="text" smil:attributeName="visibility" smil:to="visible"/>
                  <anim:animate smil:begin="0s" smil:dur="0.6s" smil:fill="hold" smil:targetElement="id4" anim:sub-item="text" smil:attributeName="x" smil:from="(-width/2)" smil:to="(x)"/>
                  <anim:animate smil:begin="0.6s" smil:dur="0.2s" smil:fill="hold" smil:decelerate="0.5" smil:autoReverse="true" smil:targetElement="id4" anim:sub-item="text" smil:attributeName="skewX" smil:from="0" smil:to="-1"/>
                  <anim:animateTransform smil:begin="0.6s" smil:dur="0.2s" smil:fill="hold" smil:decelerate="1" smil:autoReverse="true" smil:targetElement="id4" anim:sub-item="text" smil:from="1,1" smil:to="0.8,1" smil:attributeName="transform" svg:type="scale"/>
                  <anim:animate smil:begin="0.6s" smil:dur="0.2s" smil:fill="hold" smil:decelerate="1" smil:autoReverse="true" smil:targetElement="id4" anim:sub-item="text" smil:attributeName="x" smil:by="(height/3+width*0.1)" smil:additive="sum"/>
                </anim:par>
              </anim:par>
            </anim:par>
            <anim:par smil:begin="next">
              <anim:par smil:begin="0s">
                <anim:par smil:begin="0s" smil:fill="hold" presentation:node-type="on-click" presentation:preset-class="entrance" presentation:preset-id="ooo-entrance-pinwheel">
                  <anim:set smil:begin="0s" smil:dur="0.001s" smil:fill="hold" smil:targetElement="id5" smil:attributeName="visibility" smil:to="visible"/>
                  <anim:transitionFilter smil:dur="2s" smil:targetElement="id5" smil:type="fade" smil:subtype="crossfade"/>
                  <anim:animate smil:dur="2s" smil:fill="hold" smil:targetElement="id5" smil:attributeName="rotate" smil:values="720;0" smil:keyTimes="0;1"/>
                  <anim:animate smil:dur="2s" smil:fill="hold" smil:targetElement="id5" smil:attributeName="height" smil:values="0;height" smil:keyTimes="0;1"/>
                  <anim:animate smil:dur="2s" smil:fill="hold" smil:targetElement="id5" smil:attributeName="width" smil:values="0;width" smil:keyTimes="0;1"/>
                </anim:par>
                <anim:par smil:begin="0s" smil:fill="hold" presentation:node-type="with-previous" presentation:preset-class="entrance" presentation:preset-id="ooo-entrance-appear" presentation:group-id="5">
                  <anim:set smil:begin="0s" smil:dur="0.001s" smil:fill="hold" smil:targetElement="id6" anim:sub-item="text" smil:attributeName="visibility" smil:to="visible"/>
                </anim:par>
                <anim:par smil:begin="0s" smil:fill="hold" presentation:text-only="true" presentation:node-type="with-previous" presentation:preset-class="entrance" presentation:preset-id="ooo-entrance-falling-in">
                  <anim:set smil:begin="0s" smil:dur="0.003s" smil:fill="hold" smil:targetElement="id7" anim:sub-item="text" smil:attributeName="visibility" smil:to="visible"/>
                  <anim:set smil:begin="0s" smil:dur="1.365s" smil:fill="hold" smil:targetElement="id7" anim:sub-item="text" smil:attributeName="rotate" smil:to="-45"/>
                  <anim:animate smil:begin="1.365s" smil:dur="1.365s" smil:fill="hold" smil:targetElement="id7" anim:sub-item="text" smil:attributeName="rotate" smil:values="-45;45;0" smil:keyTimes="0;0.699;1"/>
                  <anim:animate smil:begin="0s" smil:dur="1.365s" smil:fill="hold" smil:targetElement="id7" anim:sub-item="text" smil:attributeName="y" smil:values="y-1;y-(0.354*width-0.172*height)" smil:keyTimes="0;1"/>
                  <anim:animate smil:begin="1.365s" smil:dur="0.468s" smil:fill="hold" smil:decelerate="0.5" smil:autoReverse="true" smil:targetElement="id7" anim:sub-item="text" smil:attributeName="y" smil:values="y-(0.354*width-0.172*height);y-(0.354*width-0.172*height)-height/2" smil:keyTimes="0;1"/>
                  <anim:animate smil:begin="2.592s" smil:dur="0.408s" smil:fill="hold" smil:targetElement="id7" anim:sub-item="text" smil:attributeName="y" smil:values="y-(0.354*width-0.172*height);y" smil:keyTimes="0;1"/>
                </anim:par>
              </anim:par>
            </anim:par>
            <anim:par smil:begin="next">
              <anim:par smil:begin="0s">
                <anim:par smil:begin="0s" smil:fill="hold" presentation:node-type="on-click" presentation:preset-class="entrance" presentation:preset-id="ooo-entrance-breaks">
                  <anim:set smil:begin="0s" smil:dur="0.004625s" smil:fill="hold" smil:targetElement="id8" anim:sub-item="text" smil:attributeName="visibility" smil:to="visible"/>
                  <anim:animate smil:begin="0s" smil:dur="2.775s" smil:fill="hold" smil:targetElement="id8" anim:sub-item="text" smil:attributeName="x" smil:from="(-width/2)" smil:to="(x)"/>
                  <anim:animate smil:begin="2.775s" smil:dur="0.925s" smil:fill="hold" smil:decelerate="0.5" smil:autoReverse="true" smil:targetElement="id8" anim:sub-item="text" smil:attributeName="skewX" smil:from="0" smil:to="-1"/>
                  <anim:animateTransform smil:begin="2.775s" smil:dur="0.925s" smil:fill="hold" smil:decelerate="1" smil:autoReverse="true" smil:targetElement="id8" anim:sub-item="text" smil:from="1,1" smil:to="0.8,1" smil:attributeName="transform" svg:type="scale"/>
                  <anim:animate smil:begin="2.775s" smil:dur="0.925s" smil:fill="hold" smil:decelerate="1" smil:autoReverse="true" smil:targetElement="id8"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9" anim:sub-item="text" smil:attributeName="visibility" smil:to="visible"/>
                  <anim:animate smil:begin="0s" smil:dur="2.775s" smil:fill="hold" smil:targetElement="id9" anim:sub-item="text" smil:attributeName="x" smil:from="(-width/2)" smil:to="(x)"/>
                  <anim:animate smil:begin="2.775s" smil:dur="0.925s" smil:fill="hold" smil:decelerate="0.5" smil:autoReverse="true" smil:targetElement="id9" anim:sub-item="text" smil:attributeName="skewX" smil:from="0" smil:to="-1"/>
                  <anim:animateTransform smil:begin="2.775s" smil:dur="0.925s" smil:fill="hold" smil:decelerate="1" smil:autoReverse="true" smil:targetElement="id9" anim:sub-item="text" smil:from="1,1" smil:to="0.8,1" smil:attributeName="transform" svg:type="scale"/>
                  <anim:animate smil:begin="2.775s" smil:dur="0.925s" smil:fill="hold" smil:decelerate="1" smil:autoReverse="true" smil:targetElement="id9"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0" anim:sub-item="text" smil:attributeName="visibility" smil:to="visible"/>
                  <anim:animate smil:begin="0s" smil:dur="2.775s" smil:fill="hold" smil:targetElement="id10" anim:sub-item="text" smil:attributeName="x" smil:from="(-width/2)" smil:to="(x)"/>
                  <anim:animate smil:begin="2.775s" smil:dur="0.925s" smil:fill="hold" smil:decelerate="0.5" smil:autoReverse="true" smil:targetElement="id10" anim:sub-item="text" smil:attributeName="skewX" smil:from="0" smil:to="-1"/>
                  <anim:animateTransform smil:begin="2.775s" smil:dur="0.925s" smil:fill="hold" smil:decelerate="1" smil:autoReverse="true" smil:targetElement="id10" anim:sub-item="text" smil:from="1,1" smil:to="0.8,1" smil:attributeName="transform" svg:type="scale"/>
                  <anim:animate smil:begin="2.775s" smil:dur="0.925s" smil:fill="hold" smil:decelerate="1" smil:autoReverse="true" smil:targetElement="id10"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1" anim:sub-item="text" smil:attributeName="visibility" smil:to="visible"/>
                  <anim:animate smil:begin="0s" smil:dur="2.775s" smil:fill="hold" smil:targetElement="id11" anim:sub-item="text" smil:attributeName="x" smil:from="(-width/2)" smil:to="(x)"/>
                  <anim:animate smil:begin="2.775s" smil:dur="0.925s" smil:fill="hold" smil:decelerate="0.5" smil:autoReverse="true" smil:targetElement="id11" anim:sub-item="text" smil:attributeName="skewX" smil:from="0" smil:to="-1"/>
                  <anim:animateTransform smil:begin="2.775s" smil:dur="0.925s" smil:fill="hold" smil:decelerate="1" smil:autoReverse="true" smil:targetElement="id11" anim:sub-item="text" smil:from="1,1" smil:to="0.8,1" smil:attributeName="transform" svg:type="scale"/>
                  <anim:animate smil:begin="2.775s" smil:dur="0.925s" smil:fill="hold" smil:decelerate="1" smil:autoReverse="true" smil:targetElement="id11"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2" anim:sub-item="text" smil:attributeName="visibility" smil:to="visible"/>
                  <anim:animate smil:begin="0s" smil:dur="2.775s" smil:fill="hold" smil:targetElement="id12" anim:sub-item="text" smil:attributeName="x" smil:from="(-width/2)" smil:to="(x)"/>
                  <anim:animate smil:begin="2.775s" smil:dur="0.925s" smil:fill="hold" smil:decelerate="0.5" smil:autoReverse="true" smil:targetElement="id12" anim:sub-item="text" smil:attributeName="skewX" smil:from="0" smil:to="-1"/>
                  <anim:animateTransform smil:begin="2.775s" smil:dur="0.925s" smil:fill="hold" smil:decelerate="1" smil:autoReverse="true" smil:targetElement="id12" anim:sub-item="text" smil:from="1,1" smil:to="0.8,1" smil:attributeName="transform" svg:type="scale"/>
                  <anim:animate smil:begin="2.775s" smil:dur="0.925s" smil:fill="hold" smil:decelerate="1" smil:autoReverse="true" smil:targetElement="id12"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3" anim:sub-item="text" smil:attributeName="visibility" smil:to="visible"/>
                  <anim:animate smil:begin="0s" smil:dur="2.775s" smil:fill="hold" smil:targetElement="id13" anim:sub-item="text" smil:attributeName="x" smil:from="(-width/2)" smil:to="(x)"/>
                  <anim:animate smil:begin="2.775s" smil:dur="0.925s" smil:fill="hold" smil:decelerate="0.5" smil:autoReverse="true" smil:targetElement="id13" anim:sub-item="text" smil:attributeName="skewX" smil:from="0" smil:to="-1"/>
                  <anim:animateTransform smil:begin="2.775s" smil:dur="0.925s" smil:fill="hold" smil:decelerate="1" smil:autoReverse="true" smil:targetElement="id13" anim:sub-item="text" smil:from="1,1" smil:to="0.8,1" smil:attributeName="transform" svg:type="scale"/>
                  <anim:animate smil:begin="2.775s" smil:dur="0.925s" smil:fill="hold" smil:decelerate="1" smil:autoReverse="true" smil:targetElement="id13" anim:sub-item="text" smil:attributeName="x" smil:by="(height/3+width*0.1)" smil:additive="sum"/>
                </anim:par>
              </anim:par>
            </anim:par>
            <anim:par smil:begin="next">
              <anim:par smil:begin="0s">
                <anim:par smil:begin="5s" smil:fill="hold" presentation:preset-property="Scale;Accelerate;Decelerate;AutoReverse" presentation:node-type="on-click" presentation:preset-class="emphasis" presentation:preset-id="ooo-emphasis-grow-and-shrink">
                  <anim:animateTransform smil:dur="5s" smil:fill="hold" smil:targetElement="id14" anim:sub-item="text" smil:by="5,5" smil:attributeName="transform" svg:type="scale"/>
                </anim:par>
                <anim:par smil:begin="14.5s" smil:fill="remove" smil:repeatCount="indefinite" presentation:preset-property="CharHeight" presentation:text-only="true" presentation:node-type="with-previous" presentation:preset-class="emphasis" presentation:preset-id="ooo-emphasis-font-size" presentation:preset-sub-type="2">
                  <anim:animate smil:dur="4.5s" smil:fill="hold" smil:targetElement="id2" anim:sub-item="text" smil:attributeName="font-size" smil:to="200%"/>
                </anim:par>
                <anim:par smil:begin="14s" smil:fill="hold" smil:repeatCount="indefinite" presentation:preset-property="Rotate;Accelerate;Decelerate;AutoReverse" presentation:node-type="with-previous" presentation:preset-class="emphasis" presentation:preset-id="ooo-emphasis-spin">
                  <anim:animateTransform smil:dur="5s" smil:fill="hold" smil:targetElement="id3" anim:sub-item="text" smil:by="360" smil:attributeName="transform" svg:type="rotate"/>
                </anim:par>
                <anim:par smil:begin="11.5s" smil:fill="hold" smil:accelerate="0.5" smil:decelerate="0.5" smil:repeatCount="indefinite" presentation:node-type="with-previous" presentation:preset-class="motion-path" presentation:preset-id="libo-motionpath-freeform-line">
                  <anim:animateMotion smil:dur="5.5s" smil:fill="hold" smil:targetElement="id3" anim:sub-item="text" svg:path="M-0.02625-0.16431746031746c-0.0101785714285714-0.0273650793650794-0.0275736943046901-0.0236115122981607-0.0416071428571429-0.036952380952381-0.0147522669820886-0.0140242118980539-0.0317856152540912-0.00514476870474126-0.0476785714285714-0.00774603174603175-0.0205713296042811-0.00336699093751644-0.0410727576274851-0.00267491840399242-0.0615357142857143 0.00774603174603175-0.0206799015318897 0.0105314313356845-0.0404256263132524 0.0243914472194476-0.0598214285714286 0.0415873015873016-0.0217827708689633 0.0193120836459923-0.0301776556919772 0.0568264155571585-0.0416428571428572 0.0893968253968254-0.0129633700046793 0.0368264156338257-0.00946743758409313 0.0826044827707605-0.00432142857142853 0.121777777777778 0.00435399110219664 0.0331441661848084 0.0200106708086925 0.058025599538796 0.026 0.0909206349206349 0.00479638733443233 0.0263430721590898 0.00857761922708533 0.0537087578808725 0.0156071428571429 0.0786031746031746 0.0064347635219254 0.022788128051711 0.00753566482832815 0.0567621833112787 0.0216785714285714 0.0646984126984127 0.037678521972379 0.0211431356929009 0.0725716205776681 0.0466655893605574 0.110107142857143 0.0678095238095238 0.0275001920178077 0.0154909861924706 0.052857107776126 0.0237411672503139 0.0806071428571429 0.0231111111111111 0.028178536615313-0.000639785136717752 0.0429288375397324 0.0340330199249643 0.0711071428571429 0.0154285714285715 0.0187502661339639-0.0123796785027896 0.0387850059113501-0.0139407058067708 0.0589285714285714-0.0123174603174603 0.0184635898031578 0.00148786662613587 0.0370357117790818 0.000825219585292414 0.0555 0 0.0198928546367436-0.000889066129016514 0.0403956448187068 0.00185213624853925 0.0598214285714286-0.0139047619047619 0.0165027897691365-0.0133859606874904 0.0295380320670623-0.0356750424389128 0.0450714285714285-0.0508571428571428 0.0167523188844676-0.0163734562154974 0.0261472974026794-0.045964406896327 0.0338214285714286-0.073968253968254 0.0092901551023476-0.0339009168647068 0.00740515542205827-0.0770945388141009-0.00521428571428573-0.109396825396825-0.0149877070427336-0.0383643937066265-0.0391783067861317-0.0558263555846011-0.0632857142857143-0.057015873015873-0.0196425966414471-0.000969212931786589-0.0400350792599426 0.00913870102162111-0.0589642857142857 0-0.014606508162834-0.00705177532887971-0.0265759586641565 0.00236934165611311-0.0450714285714286-0.0107936507936508-0.025575964638428-0.018202091167129-0.0548935469316434 0.0107839367424679-0.0823571428571429 0.016952380952381-0.0191792625392643 0.0043077465631834-0.0387866878647731 0.00103913181965352-0.0580714285714286-0.00152380952380952-0.013679555701278-0.0018180124586747-0.0269642447811598-0.00908897035266093-0.04075-0.00926984126984126-0.0152499610827743-0.00020008149022091-0.0298219180240416-0.00975481584906846-0.0450714285714286-0.0107936507936508-0.0136433581787423-0.00092941981275322-0.0284639965840005 0.00209425022374132-0.04075-0.00926984126984127-0.0220354251750022-0.0203819402705535-0.0408552941973806-0.0624764046269879-0.0424642857142857-0.106349206349206-0.00103386563749211-0.0281906906559404-0.00567378527656909-0.0569491067851284 0-0.0831746031746032 0.00575478674511931-0.0265999031774404 0.0128893503586903-0.0537868094558664 0.0268571428571429-0.0709206349206349 0.0253179232212308-0.0310566524847098 0.0508224302993059-0.0652000305291448 0.0806071428571429-0.0801269841269841 0.0197510022597267-0.00989844349410002 0.0412498266048295-0.0107275163555941 0.0632857142857143-0.0061587301587302 0.0355355409717558 0.00736772175648204 0.0680391721776665 0.0234066488997753 0.101428571428571 0.0400634920634921 0.0226106063883097 0.0112796675860049 0.0444281807486849 0.0271757037335563 0.0641785714285715 0.0493333333333333 0.0200353236250943 0.0224772910567585 0.0440012646009389 0.02873263448699 0.0658928571428571 0.0261587301587301 0.0364298495779347-0.00428324012183923 0.0626811306377783 0.0396748318077677 0.091 0.0693968253968254 0.0198954171563156 0.020881181858217 0.0434964080645826 0.0526357413435897 0.0468214285714286 0.0986031746031746 0.0024249795692266 0.0335246312841589 0.00223826747993228 0.0670519013396832 0.00607142857142856 0.100190476190476 0.00320255486205095 0.02768683639341 0.00477582637046919 0.0565690190886628 0.00260714285714286 0.0847619047619048-0.00297417435852937 0.0386642666608827-0.0128161748196483 0.0751873854978659-0.0320714285714286 0.100190476190476-0.0190304632353491 0.0247111985294831-0.0393576448432931 0.0440604087079937-0.0615714285714286 0.0554920634920635-0.0212147878390371 0.0109175516364635-0.043176967173851 0.0171516257212532-0.0641428571428571 0.0292698412698413-0.0152841114071294 0.00883416619919469-0.0299993045374485 0.0171465322827421-0.0450714285714286 0.0261587301587302-0.0126421619911127 0.00755923088128385-0.0256458644429148 0.0134457135205344-0.0381428571428572 0.0215873015873015-0.0220030115324125 0.0143346051667339-0.0456074603230264 0.01720328400708-0.0685 0.0246984126984127-0.0186074604678348 0.00609217294337983-0.0374289300150363 0.00950702717562524-0.0563571428571429 0.0107936507936508-0.017500363486484 0.00118956719123814-0.0341075428901707-0.0054509139140787-0.0511428571428572-0.00774603174603178-0.0239646871522288-0.00322869188113656-0.0426351914727385-0.0348897372993019-0.0641428571428571-0.0508571428571428-0.0166352093973105-0.0123500680669171-0.0280457505923134-0.038581601639105-0.0416071428571429-0.0585396825396826-0.0177600458742778-0.0261371712752579-0.0138837540469415-0.0621563810080348-0.0112857142857143-0.094031746031746 0.00283053230957056-0.0347278174589422 0.0226529873150931-0.0546441751052368 0.0372857142857143-0.0754920634920635 0.0155815693418032-0.0221997457604256 0.0312129533473757-0.0390525085319118 0.0485357142857143-0.053968253968254 0.0146058109675547-0.0125763184667188 0.0297189600819515-0.023086672431372 0.0450714285714286-0.0323809523809524 0.0127546879260242-0.00772160127443059 0.0231789281620989-0.0261054321842327 0.0364285714285714-0.0246349206349206 0.0182146445911637 0.00202155218063109 0.0181529866798929-0.0316730291803797 0.0233928571428571-0.0493333333333333 0.00504584937875396-0.0170063812395041 0.00914285714285714-0.032952380952381 0.0104285714285714-0.0523809523809524 0.00142857142857143-0.0215873015873016-0.00517251581444095-0.0393042110403365-0.00782142857142857-0.0586031746031746-0.00317251657059049-0.023113740358876-0.0166785714285714-0.0204444444444445-0.026-0.0246349206349207l-0.00867857142857143-0.00926984126984126-0.00953571428571429-0.0107301587301587-0.00432142857142857-0.00158730158730158z"/>
                </anim:par>
                <anim:par smil:begin="17s" smil:fill="hold" smil:accelerate="0.5" smil:decelerate="0.5" smil:repeatCount="indefinite" presentation:node-type="with-previous" presentation:preset-class="motion-path" presentation:preset-id="libo-motionpath-freeform-line">
                  <anim:animateMotion smil:dur="3.5s" smil:fill="hold" smil:targetElement="id4" anim:sub-item="text" svg:path="M-0.00264285714285714 0.0186031746031746c0.0005-0.0267301587301587-0.00479399209809688-0.0521900557902402-0.00521428571428572-0.0786031746031746-0.000293992256590757-0.0184757800364167 0.000199181621882157-0.0370788291136244 0-0.0554920634920635-0.000229390202387809-0.0212058498207409-0.00867989444756878-0.0389172952311753-0.0182142857142857-0.0508571428571428-0.00907275196992844-0.011361740150868-0.0188542586484393-0.0175341098560078-0.0286071428571429-0.0261587301587302-0.0110685476011423-0.00978808097375647-0.0239643344171845-0.0119950108698204-0.0363928571428572-0.0123809523809524-0.0121071922021359-0.000375963270711627-0.024427852078085-0.00336086520079926-0.0364285714285714 0.00311111111111109-0.0146064239331486 0.00787723026730283-0.0310318252294703 0.00464739198921654-0.0450714285714286 0.0184761904761905-0.00974611522226537 0.00959977715586502-0.0220725030722463 0.0101560138786058-0.0312142857142857 0.0215873015873016-0.0109653604492079 0.0137115697268959-0.0227209670244656 0.0262105749321359-0.0320714285714286 0.0431746031746032-0.0115423997475685 0.020940741194449-0.0211083958832798 0.045459014444255-0.0294642857142857 0.0708571428571428-0.00850125308986904 0.0258399670189239-0.000549265970391455 0.0579746596197279 0.0034642857142857 0.0847619047619048 0.00441502284203765 0.029466743789419 0.0108234385586082 0.0587261409102446 0.0233928571428572 0.0786031746031746 0.0123234389689579 0.0194880463210684 0.0251411342639975 0.0381643537092388 0.0398928571428572 0.0524444444444444 0.012926849275977 0.0125135607614906 0.0248168289433728 0.0287790559279956 0.0381428571428571 0.0400634920634921 0.0123168362164612 0.0104298557376162 0.0248224736618164 0.0205674020766064 0.0372857142857143 0.0307936507936508 0.0112153312391291 0.00920232306800331 0.0202181964206143 0.0241764931279433 0.0312142857142857 0.0339047619047619 0.0117539161491717 0.0103987201654629 0.0237822155272454 0.0201391015585174 0.0355357142857143 0.0308571428571428 0.010317934041944 0.00940894668477893 0.0207174781313152 0.0189124749914487 0.0303214285714286 0.0307936507936508 0.0111817658838073 0.0138331124335759 0.0193565141103299 0.0335250845034092 0.0295 0.0493333333333333 0.00896365702151973 0.0139695290320839 0.0104610397634016 0.03632424731554 0.0190714285714286 0.0493333333333333 0.00399675671978795 0.00603853706483537 0.00203342624667961 0.0624758146328923 0.00432142857142857 0.0184761904761905 0.00103342627810291-0.0198733923206029 0.00836223605875408-0.0356664898226643 0.0173571428571429-0.0446984126984127 0.0102908159732857-0.0103331650102129 0.0218142878938638-0.0159590301342281 0.0320714285714286-0.0262222222222222 0.00992144667413036-0.00992730003500003 0.0206473429996303-0.0170595586309906 0.0312142857142857-0.0246349206349206 0.0113973543134095-0.00817067785286513 0.0215702465246738-0.0207017710681526 0.0320714285714286-0.0323809523809524 0.01182024684558-0.013146215869502 0.0231054451211142-0.0285744147089813 0.0329285714285714-0.0462222222222222 0.010462588256748-0.0187966374315285 0.0236783118846645-0.0279369279490099 0.0338214285714286-0.0477460317460317 0.00942831189037627-0.0184131184363552 0.0190304311142008-0.0361980185098077 0.02775-0.0554920634920635 0.00967329022072591-0.0214043720612223 0.0208592039677263-0.0408867745545172 0.0286071428571429-0.0647619047619047 0.00778777557834254-0.0239978862265963 0.0159356932521264-0.0479893801874321 0.026-0.0693333333333333 0.0121499822054376-0.0257671648343972 0.0182457181598221-0.0599996316067487 0.0173214285714286-0.094031746031746-0.000682853323168031-0.0251424907532873 0.00435671144256994-0.0516187987788682 0-0.0754920634920635-0.00432185999051621-0.0236822908670994-0.022793286276503-0.0220194315205423-0.0320714285714286-0.0400634920634921-0.00782900620775051-0.0152257917062816-0.0199655376985264-0.0150413557515907-0.0303214285714286-0.0215873015873016-0.0137512530347127-0.0086921500663863-0.0283917553330717-0.015458886524786-0.0433571428571428-0.0139047619047619-0.0107132117967792 0.00111254494319823-0.021462657426257 0.00166914373123228-0.0320714285714286 0.00463492063492063-0.0127840951874823 0.0035739082050841-0.0257514970465529 0.00570541229556779-0.0381428571428571 0.0123174603174603-0.0112872134408679 0.00602287373818058-0.0231815329201191 0.00957618285986067-0.0338214285714286 0.0185396825396826-0.00918153688734207 0.00773491636074786-0.0186069573485003 0.0147312714131242-0.0286071428571429 0.02-0.0106069573865529 0.00558841429031559-0.0190710046242511 0.0202545221235141-0.026 0.037015873015873-0.00742814749493254 0.01796880787055-0.0157494092102046 0.0340326933365523-0.0242857142857143 0.0508571428571429-0.00757083781701905 0.0149215822951841-0.0119642857142857 0.0351746031746032-0.0138571428571429 0.0554920634920635l-0.00435714285714286 0.016952380952381-0.00692857142857143 0.0123174603174603"/>
                </anim:par>
                <anim:par smil:begin="13s" smil:fill="hold" smil:accelerate="0.5" smil:decelerate="0.5" smil:repeatCount="indefinite" presentation:node-type="with-previous" presentation:preset-class="motion-path" presentation:preset-id="libo-motionpath-freeform-line">
                  <anim:animateMotion smil:dur="6s" smil:fill="hold" smil:targetElement="id2" anim:sub-item="text" svg:path="M-0.129785714285714-0.0325079365079365c-0.0250714285714286-0.0242539682539683-0.0550372410513388-0.0191032873010391-0.0815-0.0354285714285714-0.0213943847270189-0.0131985259012455-0.0446776141477172-0.0142723832110458-0.06675-0.00926984126984128-0.0174276170348984 0.00394983966553454-0.0312137721331984-0.0114161558786607-0.0476785714285714-0.00926984126984126-0.0171423464655613 0.00223463815066474-0.0327112444083881-0.0142393489185864-0.0485357142857143-0.0231111111111111-0.0146398219403592-0.00820760630862395-0.0298919098326526-0.0130348277865671-0.0451071428571428-0.0154285714285714-0.00496335359263311-0.000780861922144854-0.0526773902986895 0.000963704502166526-0.00778571428571429-0.0138412698412698 0.0246083252631866-0.00811566099806815 0.049428565990015-0.0170086671192201 0.0745357142857143-0.016952380952381 0.0315357094348318 7.06979614624181E-005 0.0629634763378833-0.00951121738449856 0.0945-0.00311111111111109 0.0310349065130633 0.00629830675049484 0.0624284929232683 0.00519263121840854 0.0936428571428571 0.00463492063492063 0.0256427807523205-0.000458162470169859 0.0510014780553105 0.0164608886487271 0.0762857142857143 0.00926984126984126 0.0450371949827151-0.0128089533724329 0.0893569291491439-0.0401203821211554 0.13525-0.0354285714285714 0.0242855010119047 0.0024827925264079 0.0486764054026909 0.00427954029546815 0.0728214285714286 0.0107301587301587 0.0143549883237809 0.00383509892138118 0.0287474303836817 0.00845754674033006 0.0424642857142857 0.0169523809523809 0.0156045769619115 0.0096638982511445 0.0308607380846005 0.0210574197475706 0.0468214285714286 0.0293333333333333 0.0140393197114099 0.00727964725776811 0.052888367283605 0.0062127444251484 0.0416071428571428 0.0231111111111111-0.0402187771859615 0.0602444928721753-0.100750180906672 0.0473639370603902-0.150857142857143 0.0724444444444445-0.0455358952010399 0.0227925084932929-0.0924287249951203 0.0375840847353105-0.139571428571429 0.0446984126984127-0.0256430108079747 0.0038697990358998-0.0493926600322114 0.0213988151312469-0.0745357142857143 0.0292698412698413-0.0190712315185358 0.00597024372075507-0.0389299190948279 0.000184055740492892-0.0572142857142857 0.0123174603174603-0.020465634055817 0.013580881585427-0.0416810083597225 0.00302701586372697-0.0624285714285714 0.0107936507936508-0.0265738712658457 0.00994765294178068-0.0537140667511081 0.00503229709659163-0.0806428571428572 0.00615873015873016-0.0246783557794319 0.00103229723521808-0.0484282926417037 0.0101049309814308-0.0728214285714285 0.0123174603174603-0.0141068657332621 0.00127953430687182-0.0277156903736859 0.00874460131447261-0.0416071428571429 0.0123174603174603-0.00857284216505039 0.00220492107265737-0.0498178039146892 0.0420525200045627-0.00432142857142859 0.016952380952381 0.0305750569615041-0.0168681169757364 0.064358486535292-0.0096014020130622 0.0962142857142858 0 0.0323942027793031 0.0097636779422518 0.0651441726967368-0.0106738830088221 0.0971071428571429 0.00774603174603175 0.0277513161084785 0.0159927839774538 0.0564977040102484 0.025669085383648 0.0849642857142857 0.036952380952381 0.0362477073302943 0.0143674993980269 0.0694580280465151 0.0445453865557547 0.104892857142857 0.0632380952380952 0.0192080458627752 0.010132697541554 0.0393596517779094 0.0127404580268502 0.0589642857142857 0.02 0.0165739455933826 0.00613728642352301 0.0326440647604507 0.0155449664460893 0.0493928571428571 0.0215873015873016 0.0173940668392753 0.00627512592620999 0.0345356667941121 0.00869892347091844 0.0520357142857143 0.0138412698412698 0.0127499525139935 0.00374654252018175 0.0217867596161953 0.0180108892501944 0.0346785714285714 0.0200634920634921 0.0568939090206218 0.00905850934025593-0.136857738535634 0.0353567357867659-0.0893214285714286 0.0246349206349206 0.0383208334120257-0.00864326433031459-0.0766072488713244 0.0146834902885926-0.115285714285714 0.0139047619047619-0.0243929661503488-0.000491112946276018-0.0484997110690598 0.00997009823164841-0.0719642857142857 0.0215873015873016-0.0210354254032876 0.0104145427001117-0.0423527718214716 0.0197085937913095-0.0632857142857143 0.0307936507936508-0.0193527825030549 0.0102482819874333-0.0387496592319485 0.020001288969862-0.0572142857142857 0.0354285714285715-0.0189996592600183 0.0158743048663303-0.0401434256740887 0.0218997964086337-0.0606785714285714 0.0293333333333333-0.018929140355811 0.00685217750436601-0.0382137104019737 0.0055968602779195-0.0572142857142857 0.00920634920634916-0.0211065689904782 0.00400955896524369-0.0421792062944992 0.00868672940885351-0.0632857142857143 0.0123174603174603-0.0660006362162006 0.0113533963077934 0.0114262940693871 0.0031362905158438 0.0329285714285715 0.00926984126984126 0.0225691603220534 0.00643788041601523 0.0456428157798278 0.00273808484884802 0.0685 0.00311111111111112 0.0354999593517639 0.000579354701783164 0.0711070902138238 0.000833914239349254 0.106642857142857 0.00152380952380954 0.0331428051688022 0.000643438061866175 0.0645382771143561 0.0183943416904074 0.0962142857142857 0.0323809523809523 0.0341811374995351 0.0150927558204744 0.0686411737462605 0.0205894196602408 0.103178571428571 0.0307936507936508 0.0157483213378794 0.00465291312255522 0.0312158326802964 0.0102076206127516 0.0467857142857143 0.0154285714285715 0.0183229795442623 0.00614412989284252 0.06978600944306 0.0120580835774824-0.0181785714285714-0.00311111111111118-0.0287497050562296-0.00495778947522085-0.0572857384221587 0.00449181734628623-0.0858214285714286 0.00463492063492066-0.022107170293453 0.000110864981882286-0.043928582482266 0.00495174504789098-0.0658928571428571 0.00615873015873014-0.0207857253453992 0.00114222123869634-0.041680005759935-0.00103860202261608-0.0624285714285714 0.00311111111111118-0.0192514425151565 0.00385028850303137-0.0386782247225437 0.00530221367058104-0.0580714285714286 0.00463492063492055-0.0193568119665445-0.000666040841859616-0.0388557221522572 0.00122383393378023-0.0581071428571429 0.00615873015873025-0.0151771564231062 0.00389050206143249-0.030571339193366 0.00400686963988584-0.0459285714285714 0.00463492063492055-0.0110356260703365 0.00045131413187971-0.03364476223805 0.0209521703623067-0.0329642857142857 0.00152380952380959 0.00110523777865512-0.0315557666225809 0.0297445238725085-0.0267526906637526 0.0451071428571428-0.0385396825396825 0.0151731058263978-0.011641587628207 0.030572501570353-0.0225351012317052 0.0459285714285714-0.0339047619047619 0.0158582162816488-0.0117414507531557 0.031613297046011-0.0229630576001223 0.0468214285714286-0.0370158730158731 0.0218275905924664-0.0201694140436549 0.0417918003381685-0.0462030762811009 0.0632857142857143-0.0678095238095238 0.0262560909578421-0.0263935574026475 0.0472766419374928-0.06567150094477 0.0710714285714286-0.0986031746031746 0.01506236358059-0.020846114301895 0.0323961707001326-0.0340881781406833 0.0468214285714286-0.0554920634920635 0.0132176004145076-0.0196119893603719 0.0277513538928594-0.0361853961157617 0.0433571428571429-0.0493333333333333 0.0179299258107147-0.0151060314486202 0.0377160347775775-0.0152980079063262 0.05375-0.0400634920634921 0.0171803207362286-0.0265361035218594 0.0743957609360617-0.0158233593220253-0.00867857142857143-0.0709206349206349-0.0184970982086009-0.0122678050941245-0.0300698425235361-0.0275603902321814-0.0450714285714286-0.0431111111111111-0.00949841458798521-0.00984610517704976-0.0206861383912941-0.013317048744341-0.0294642857142857-0.0262222222222222-0.0108290041801934-0.015920236058475-0.0244642857142857-0.0246349206349206-0.0355714285714286-0.0400634920634921l-0.00953571428571429-0.00926984126984127-0.0121428571428572-0.0107936507936508-0.0017142857142857-0.00457142857142857z"/>
                </anim:par>
                <anim:par smil:begin="15s" smil:fill="hold" smil:repeatCount="indefinite" presentation:preset-property="Rotate;Accelerate;Decelerate;AutoReverse" presentation:node-type="with-previous" presentation:preset-class="emphasis" presentation:preset-id="ooo-emphasis-spin">
                  <anim:animateTransform smil:dur="2s" smil:fill="hold" smil:targetElement="id2" anim:sub-item="text" smil:by="360" smil:attributeName="transform" svg:type="rotate"/>
                </anim:par>
                <anim:par smil:begin="13.5s" smil:fill="hold" smil:accelerate="0.5" smil:decelerate="0.5" smil:repeatCount="indefinite" presentation:preset-property="Color" presentation:node-type="with-previous" presentation:preset-class="emphasis" presentation:preset-id="ooo-emphasis-teeter">
                  <anim:animateColor smil:dur="0.1s" smil:fill="hold" smil:targetElement="id6" anim:sub-item="text" smil:attributeName="color" smil:to="#333399" anim:color-interpolation="rgb" anim:color-interpolation-direction="clockwise"/>
                  <anim:animateColor smil:dur="0.1s" smil:fill="hold" smil:targetElement="id6" anim:sub-item="text" smil:attributeName="fill-color" smil:to="#333399" anim:color-interpolation="rgb" anim:color-interpolation-direction="clockwise"/>
                  <anim:set smil:dur="0.1s" smil:fill="hold" smil:targetElement="id6" anim:sub-item="text" smil:attributeName="fill" smil:to="solid"/>
                  <anim:animateTransform smil:begin="0s" smil:dur="0.1s" smil:fill="hold" smil:targetElement="id6" anim:sub-item="text" smil:by="2" smil:attributeName="transform" svg:type="rotate"/>
                  <anim:animateTransform smil:begin="0.2s" smil:dur="0.2s" smil:fill="hold" smil:targetElement="id6" anim:sub-item="text" smil:by="-4" smil:attributeName="transform" svg:type="rotate"/>
                  <anim:animateTransform smil:begin="0.4s" smil:dur="0.2s" smil:fill="hold" smil:targetElement="id6" anim:sub-item="text" smil:by="4" smil:attributeName="transform" svg:type="rotate"/>
                  <anim:animateTransform smil:begin="0.6s" smil:dur="0.2s" smil:fill="hold" smil:targetElement="id6" anim:sub-item="text" smil:by="-4" smil:attributeName="transform" svg:type="rotate"/>
                  <anim:animateTransform smil:begin="0.8s" smil:dur="0.2s" smil:fill="hold" smil:targetElement="id6" anim:sub-item="text" smil:by="2" smil:attributeName="transform" svg:type="rotate"/>
                </anim:par>
                <anim:par smil:begin="15s" smil:fill="hold" smil:accelerate="0.5" smil:decelerate="0.5" smil:repeatCount="indefinite" presentation:node-type="with-previous" presentation:preset-class="motion-path" presentation:preset-id="libo-motionpath-freeform-line">
                  <anim:animateMotion smil:dur="5s" smil:fill="hold" smil:targetElement="id6" anim:sub-item="text" svg:path="M-0.23325-0.0753650793650794c-0.0256071428571429-0.0340952380952381-0.0518670237519089-0.0723756601173202-0.0615357142857143-0.129460317460317-0.0067955962896602-0.040121698412031-0.0224794501325387-0.0757459628968092-0.0225357142857143-0.120190476190476-5.0878725764425E-005-0.0401904245593854-0.0021472384412346-0.081081958051057 0.00517857142857142-0.120190476190476 0.00506704762838056-0.0270502139162219 0.0132949086240995-0.05141665520377 0.0225357142857143-0.073968253968254 0.0085806279538026-0.0209404770371133 0.0244268557029759-0.060883995614497 0.0390357142857143-0.0446984126984127 0.0327839989350053 0.0363223540072001 0.0165410278479765 0.131108241259447 0.026 0.18647619047619 0.00836245671280145 0.0489495128181081 0.000358478913183025 0.102539200322095 0.00607142857142856 0.152571428571429 0.00396562178603815 0.0347296766501743 0.00317759536596549 0.0686350225631969 0.00432142857142859 0.103238095238095 0.000999023940478849 0.0302223242438199 0.00154882948934346 0.0604379608712225 0.00607142857142856 0.0893968253968254 0.00354883282408591 0.0227236965097812 0.00225648248594101 0.0473562675856679 0.0103928571428571 0.0662857142857143 0.00875648539624743 0.0203721473724301 0.0299705882700718 0.0326449232259149 0.0425 0.00768253968253968 0.0194348760610596-0.0387201602765841 0.0314505492999371-0.0894586635542992 0.0294642857142857-0.141777777777778-0.0019065939989916-0.0502205799530513-0.00239421272534726-0.100952658961845 0.000857142857142848-0.151047619047619 0.00253435871181312-0.0390478971894168 0.00296063562460983-0.0782871568650561 0.00782142857142858-0.117142857142857 0.00521063575562267-0.0416522372774124 0.0304201006223724-0.06133949397289 0.039-0.0986031746031746 0.0108486733054638-0.0471172771992203 0.0584968918238057-0.0882543115003209 0.0546071428571429 0.0231111111111111-0.00225310818924838 0.064507593635329 0.00521034018346752 0.128635763016426 0.00953571428571429 0.192634920634921 0.00363891166889555 0.0538421130640367 0.00707933212202923 0.107746099536847 0.00692857142857143 0.16184126984127-6.35250379827992E-005 0.022793724739901-0.00424478022775858 0.0481199470499247 0.0035 0.0662857142857143 0.0127195071129154 0.0298342365789849 0.0285709143619038 0.0538428611148444 0.0467857142857143 0.0724444444444444 0.0139280572698026 0.0142238135476305 0.0342797706188606 0.02398880138017 0.0476785714285714 0.00152380952380952 0.0267797728414457-0.0449000912351984 0.0233566569165908-0.116317439996824 0.0225714285714286-0.17568253968254-0.00057191451217796-0.0432380749323756-0.000142027375437143-0.086412744128239-0.00089285714285714-0.129460317460317-0.000534884519353976-0.0306667124429609 0.00284490402654417-0.0608919264912818 0.00521428571428571-0.090984126984127 0.00209490534624579-0.0266062289663647 0.00800004543353643-0.0524443647881416 0.0182142857142857-0.0708571428571429 0.0178571882908337-0.0321903965344518 0.0185692578873561-0.0814021195994941 0.039-0.107873015873016 0.0178906869237204-0.0231798979796614 0.0337458368608881-0.0646099982748078 0.0598214285714286-0.0508571428571428 0.0158172754147627 0.00834238794254039 0.0335758588459769 0.0133243182602619 0.0468214285714286 0.0339047619047619 0.0309687173742401 0.0481179712065019 0.0330397946498289 0.13085837240165 0.0268571428571429 0.19568253968254-0.00638877685491235 0.0669853573272621-0.00292164232828912 0.132823277822172 0.0034642857142857 0.198857142857143 0.00354264369741369 0.0366328048519132-0.0113624790118428 0.0467347887376797-0.0034642857142857 0.0754920634920635 0.0114232360006368 0.0415919342409712 0.00736347094349782 0.0890739800393158 0.0190714285714286 0.132571428571429 0.0117563288680057 0.043677157546482 0.043185741619067 0.0529729309775373 0.0632857142857143 0.0307936507936508 0.0171857488278751-0.0189635849135173 0.0354291722211242-0.0309833012024685 0.0494285714285714-0.0631746031746032 0.0209291722339845-0.0481261583748972 0.0221704685194236-0.105781204796043 0.0294642857142857-0.160253968253968 0.00781332615536601-0.058352637050004-0.00307174507242547-0.113333464794954 0.00432142857142859-0.169587301587302 0.00689254064262668-0.0524445759118978 0.0569288247186699-0.110222736968166 0.0346785714285715-0.144825396825397-0.0376426038557561-0.0585401972902875-0.0887141925978238 0.0556194606163834-0.13175 0.0862857142857142-0.0610356211703215 0.0434924764901611-0.11277842168395 0.120030067503151-0.173392857142857 0.16647619047619-0.016528432698079 0.012664996577705-0.0344317021395253 0.013194242459764-0.0502857142857143 0.0261587301587302-0.0898959895740353 0.0735117041839234-0.189211604370966 0.0735365126035853-0.28 0.134095238095238-0.0397116052950438 0.0264888941723555-0.0810341606419258 0.0622546148396082-0.123964285714286 0.0554920634920635-0.0106770356803821-0.001681895915897-0.0355919732069466 0.0192438153973309-0.0303571428571429-0.0246984126984127 0.00297945808282191-0.0250101756749343 0.0181785714285714-0.0344761904761905 0.02775-0.0508571428571429l0.013-0.0169523809523809 0.0034642857142857-0.00457142857142857z"/>
                </anim:par>
                <anim:par smil:begin="18s" smil:fill="hold" smil:repeatCount="indefinite" presentation:preset-property="Rotate;Accelerate;Decelerate;AutoReverse" presentation:node-type="with-previous" presentation:preset-class="emphasis" presentation:preset-id="ooo-emphasis-spin">
                  <anim:animateTransform smil:dur="12s" smil:fill="hold" smil:targetElement="id6" anim:sub-item="text" smil:by="360" smil:attributeName="transform" svg:type="rotate"/>
                </anim:par>
                <anim:par smil:begin="17s" smil:fill="hold" smil:repeatCount="indefinite" presentation:text-only="true" presentation:node-type="with-previous" presentation:preset-class="emphasis" presentation:preset-id="ooo-emphasis-wave">
                  <anim:animateMotion smil:begin="0s" smil:dur="3.5s" smil:fill="hold" smil:accelerate="0.5" smil:decelerate="0.5" smil:autoReverse="true" smil:targetElement="id14" anim:sub-item="text" svg:path="M 0.0 0.0 L 0.0 -0.07213"/>
                  <anim:animateTransform smil:begin="0s" smil:dur="1.75s" smil:fill="hold" smil:targetElement="id14" anim:sub-item="text" smil:by="25" smil:attributeName="transform" svg:type="rotate"/>
                  <anim:animateTransform smil:begin="1.75s" smil:dur="1.75s" smil:fill="hold" smil:targetElement="id14" anim:sub-item="text" smil:by="-25" smil:attributeName="transform" svg:type="rotate"/>
                  <anim:animateTransform smil:begin="3.5s" smil:dur="1.75s" smil:fill="hold" smil:targetElement="id14" anim:sub-item="text" smil:by="-25" smil:attributeName="transform" svg:type="rotate"/>
                  <anim:animateTransform smil:begin="5.25s" smil:dur="1.75s" smil:fill="hold" smil:targetElement="id14" anim:sub-item="text" smil:by="25" smil:attributeName="transform" svg:type="rotate"/>
                </anim:par>
                <anim:par smil:begin="15s" smil:fill="hold" smil:repeatCount="indefinite" presentation:preset-property="Rotate;Accelerate;Decelerate;AutoReverse" presentation:node-type="with-previous" presentation:preset-class="emphasis" presentation:preset-id="ooo-emphasis-spin">
                  <anim:animateTransform smil:dur="0.5s" smil:fill="hold" smil:targetElement="id5" smil:by="360" smil:attributeName="transform" svg:type="rotate"/>
                </anim:par>
                <anim:par smil:begin="15s" smil:fill="hold" smil:accelerate="0.5" smil:decelerate="0.5" smil:repeatCount="indefinite" presentation:node-type="with-previous" presentation:preset-class="motion-path" presentation:preset-id="libo-motionpath-freeform-line">
                  <anim:animateMotion smil:dur="5.5s" smil:fill="hold" smil:targetElement="id5" svg:path="M0.171678571428571-0.013968253968254c-0.00925000000000001-0.127365079365079 0.0070787278188291-0.253777486325518 0.00867857142857145-0.380698412698413 0.000400156432049686-0.0317457436092722 0.00498913899911113-0.0636164432751312 0.00257142857142856-0.0955555555555556-0.00197514769784124-0.0260926467328191-0.00307601497663226-0.0517458209521516-0.00346428571428573-0.0786031746031746-0.000397443583433688-0.0274918551449873 0.00689505286966455-0.0497161477140792-0.000857142857142834-0.0786031746031746-0.00489066159900722-0.0182240849037708 0.0053262039939678-0.0475026185243029-0.00346428571428573-0.0600634920634922-0.0405309413043898-0.0579153204252928-0.104785728834801-0.014667223784993-0.151714285714286-0.0107936507936508-0.0546071574081755 0.00450737938977086-0.0907486124078096-0.0674841192646827-0.140428571428571-0.040063492063492-0.0492486128115266 0.0271825476248138-0.100926912537086 0.0413666865604392-0.151714285714286 0.0493333333333333-0.0317840643968633 0.00498573559166482-0.0637847202028344 0.000149993150894812-0.09625 0.00457142857142856-0.0369990107608182 0.0050388826994453-0.0716070697634515-0.0357173717430486-0.109214285714286-0.0354285714285714-0.0285356492012834 0.000219136254965502-0.0569997795466729-0.00279094706872018-0.0858214285714286 0.00463492063492055-0.0204640653575978 0.00527254501967089-0.0411771710221172 0.0018622268357984-0.0615714285714286 0.00615873015873025-0.0139628936915498 0.00294159368137981-0.0365671026795704-0.0263512847790269-0.0259999999999999 0.0431746031746031 0.0120043260134132 0.0789820493540744 0.00197857618402397 0.162664418027823 0.00607142857142851 0.245015873015873 0.0028714337992608 0.0577755386435887 0.0062503383021395 0.120952592874397-0.00521428571428573 0.178793650793651-0.0145353759846834 0.0733335452609422-0.0201665377314225 0.151810678433059-0.0225357142857142 0.229650793650794-0.00141653797054864 0.046540845019785-0.0122128725328111 0.0900318205881431-0.013 0.137142857142857-0.000391443964752325 0.0234286461866582 0.0015572849590384 0.0462902892267952 0 0.0693333333333333-0.00672843198171169 0.0995601697830293 0.104644292106862 0.0108508713675395 0.138714285714286 0.0354920634920635 0.0391442924484424 0.028311189074906 0.0837171086574672 0.0250859210751134 0.124821428571429-0.0308571428571428 0.0225742519812212-0.030723603369469 0.0546435319312161-0.0313104470972134 0.0823571428571429-0.0246349206349207 0.0263221042796419 0.00634034677515061 0.0526437744810077 0.0358797857787511 0.0788928571428572 0.0246349206349207 0.0459294892007998-0.0196757699627595 0.0890697855109656-0.0579819437920678 0.13525-0.0754920634920635 0.0479269296288129-0.0181724204605644 0.0980001384967129-0.0253242340192057 0.14825-0.0277460317460317 0.0314287106027354-0.00151471024233177 0.0630692054288633-0.010802415069591 0.0918928571428572-0.0339047619047619 0.0133192067629292-0.0106754320118695 0.0288571428571429-0.00196825396825397 0.0398571428571429-0.0215873015873016l0.0104285714285714-0.0138412698412698 0.00432142857142856-0.00926984126984127"/>
                </anim:par>
                <anim:par smil:begin="16.5s" smil:fill="hold" smil:accelerate="0.5" smil:decelerate="0.5" smil:repeatCount="indefinite" presentation:node-type="with-previous" presentation:preset-class="motion-path" presentation:preset-id="libo-motionpath-freeform-line">
                  <anim:animateMotion smil:dur="2s" smil:fill="hold" smil:targetElement="id8"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4s" smil:fill="hold" smil:accelerate="0.5" smil:decelerate="0.5" smil:repeatCount="indefinite" presentation:node-type="with-previous" presentation:preset-class="motion-path" presentation:preset-id="libo-motionpath-freeform-line">
                  <anim:animateMotion smil:dur="2s" smil:fill="hold" smil:targetElement="id9"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5.5s" smil:fill="hold" smil:accelerate="0.5" smil:decelerate="0.5" smil:repeatCount="indefinite" presentation:node-type="with-previous" presentation:preset-class="motion-path" presentation:preset-id="libo-motionpath-freeform-line">
                  <anim:animateMotion smil:dur="2s" smil:fill="hold" smil:targetElement="id10"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3.5s" smil:fill="hold" smil:accelerate="0.5" smil:decelerate="0.5" smil:repeatCount="indefinite" presentation:node-type="with-previous" presentation:preset-class="motion-path" presentation:preset-id="libo-motionpath-freeform-line">
                  <anim:animateMotion smil:dur="2s" smil:fill="hold" smil:targetElement="id11"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7.5s" smil:fill="hold" smil:accelerate="0.5" smil:decelerate="0.5" smil:repeatCount="indefinite" presentation:node-type="with-previous" presentation:preset-class="motion-path" presentation:preset-id="libo-motionpath-freeform-line">
                  <anim:animateMotion smil:dur="2s" smil:fill="hold" smil:targetElement="id12"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6.5s" smil:fill="hold" smil:accelerate="0.5" smil:decelerate="0.5" smil:repeatCount="indefinite" presentation:node-type="with-previous" presentation:preset-class="motion-path" presentation:preset-id="libo-motionpath-freeform-line">
                  <anim:animateMotion smil:dur="2s" smil:fill="hold" smil:targetElement="id13"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iterate smil:begin="14s" smil:fill="hold" presentation:preset-property="Color" presentation:text-only="true" presentation:node-type="with-previous" presentation:preset-class="emphasis" presentation:preset-id="ooo-emphasis-style-emphasis" smil:targetElement="id8"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9"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10"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11"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12"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4s" smil:fill="hold" presentation:preset-property="Color" presentation:text-only="true" presentation:node-type="with-previous" presentation:preset-class="emphasis" presentation:preset-id="ooo-emphasis-style-emphasis" smil:targetElement="id13"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par>
            </anim:par>
          </anim:seq>
        </anim:par>
        <presentation:notes draw:style-name="dp2">
          <draw:page-thumbnail draw:style-name="gr4" draw:layer="layout" svg:width="17cm" svg:height="9.56cm" svg:x="2cm" svg:y="2.5cm" draw:page-number="2" presentation:class="page"/>
          <draw:frame presentation:style-name="pr2" draw:text-style-name="P13" draw:layer="layout" svg:width="17cm" svg:height="14cm" svg:x="2cm" svg:y="13cm" presentation:class="notes" presentation:placeholder="true">
            <draw:text-box/>
          </draw:frame>
        </presentation:notes>
      </draw:page>
      <draw:page draw:name="page3" draw:style-name="dp4" draw:master-page-name="Sunset" presentation:presentation-page-layout-name="AL2T1" xml:id="id15" draw:id="id15">
        <office:forms form:automatic-focus="false" form:apply-design-mode="false"/>
        <draw:frame presentation:style-name="pr3" draw:layer="layout" svg:width="10cm" svg:height="2.5cm" svg:x="9cm" svg:y="1.25cm" presentation:class="title">
          <draw:text-box>
            <text:p><text:span text:style-name="T1">Slipshow</text:span></text:p>
          </draw:text-box>
        </draw:frame>
        <draw:custom-shape draw:style-name="gr10" draw:text-style-name="P11" draw:layer="layout" svg:width="20.32cm" svg:height="11.43cm" svg:x="3.17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8" draw:layer="layout" svg:width="23cm" svg:height="10cm" svg:x="2.5cm" svg:y="4cm" presentation:class="outline" presentation:user-transformed="true">
          <draw:text-box>
            <text:list text:style-name="L3">
              <text:list-item>
                <text:p><text:span text:style-name="T1">Example :</text:span></text:p>
              </text:list-item>
            </text:list>
          </draw:text-box>
        </draw:frame>
        <anim:par presentation:node-type="timing-root">
          <anim:par smil:begin="id15.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3" presentation:class="page"/>
          <draw:frame presentation:style-name="pr2" draw:text-style-name="P1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radial" draw:cx="50%" draw:cy="80%" draw:start-color="#2a6099" draw:end-color="#158466" draw:start-intensity="100%" draw:end-intensity="100%" draw:border="33%">
      <loext:gradient-stop svg:offset="0" loext:color-type="rgb" loext:color-value="#2a6099"/>
      <loext:gradient-stop svg:offset="1" loext:color-type="rgb" loext:color-value="#158466"/>
    </draw:gradient>
    <draw:gradient draw:name="Gradient_20_3" draw:display-name="Gradient 3" draw:style="radial" draw:cx="50%" draw:cy="90%" draw:start-color="#ffbf00" draw:end-color="#ffff00" draw:start-intensity="100%" draw:end-intensity="100%" draw:border="33%">
      <loext:gradient-stop svg:offset="0" loext:color-type="rgb" loext:color-value="#ffbf00"/>
      <loext:gradient-stop svg:offset="1" loext:color-type="rgb" loext:color-value="#ffff00"/>
    </draw:gradient>
    <draw:gradient draw:name="Gradient_20_5" draw:display-name="Gradient 5" draw:style="radial" draw:cx="50%" draw:cy="100%" draw:start-color="#ff8000" draw:end-color="#ffff00" draw:start-intensity="100%" draw:end-intensity="100%" draw:border="0%">
      <loext:gradient-stop svg:offset="0" loext:color-type="rgb" loext:color-value="#ff8000"/>
      <loext:gradient-stop svg:offset="1" loext:color-type="rgb" loext:color-value="#ffff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fill-image draw:name="Bitmap_20_23" draw:display-name="Bitmap 23" xlink:href="Pictures/100000000000000800000008BD9B8880.png" xlink:type="simple" xlink:show="embed" xlink:actuate="onLoad"/>
    <draw:opacity draw:name="Transparency_20_3" draw:display-name="Transparency 3" draw:style="linear" draw:start="100%" draw:end="0%" draw:angle="0deg" draw:border="0%">
      <loext:opacity-stop svg:offset="0" svg:stop-opacity="1"/>
      <loext:opacity-stop svg:offset="1" svg:stop-opacity="0"/>
    </draw:opacity>
    <draw:marker draw:name="_3f_" draw:display-name="?" svg:viewBox="0 0 20 30" svg:d="M20 0h-20l10 30z"/>
    <draw:marker draw:name="Arrow" svg:viewBox="0 0 20 30" svg:d="M10 0l-10 30h20z"/>
    <draw:marker draw:name="Arrowheads_20_1" draw:display-name="Arrowheads 1" svg:viewBox="0 0 20 30" svg:d="M10 0l-10 30h20z"/>
    <draw:marker draw:name="Arrowheads_20_2" draw:display-name="Arrowheads 2" svg:viewBox="0 0 20 30" svg:d="M10 0l-10 30h20z"/>
    <draw:stroke-dash draw:name="_3f_" draw:display-name="?" draw:style="rect" draw:dots1="1" draw:dots1-length="0.08cm" draw:dots2="1" draw:dots2-length="0.08cm" draw:distance="0.08cm"/>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loext:decorative="false"/>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loext:decorative="false"/>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loext:decorative="false"/>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loext:decorative="false"/>
    </style:style>
    <style:style style:name="Mgr7" style:family="graphic">
      <style:graphic-properties style:writing-mode="lr-tb" loext:decorative="false"/>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pr1" style:family="presentation" style:parent-style-name="Sunset-backgroundobjects">
      <style:graphic-properties draw:stroke="none" draw:fill="none" draw:fill-color="#ffffff" draw:auto-grow-height="false" fo:min-height="1.449cm" loext:decorative="false"/>
      <style:paragraph-properties style:writing-mode="lr-tb"/>
    </style:style>
    <style:style style:name="Mpr2" style:family="presentation" style:parent-style-name="Sunset-backgroundobjects">
      <style:graphic-properties draw:stroke="none" draw:fill="none" draw:fill-color="#ffffff" draw:auto-grow-height="false" fo:min-height="1.485cm" loext:decorative="false"/>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3:17:06.802320373</meta:creation-date>
    <meta:editing-duration>P5DT13H23M56S</meta:editing-duration>
    <meta:editing-cycles>26</meta:editing-cycles>
    <meta:generator>LibreOffice/24.8.2.1$Linux_X86_64 LibreOffice_project/480$Build-1</meta:generator>
    <dc:title>Sunset</dc:title>
    <dc:date>2024-11-21T16:09:20.802754674</dc:date>
    <meta:document-statistic meta:object-count="51"/>
  </office:meta>
</office:document-meta>
</file>