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171cm" fo:min-width="12.121cm" fo:padding-top="0.17cm" fo:padding-bottom="0.17cm" fo:padding-left="0.29cm" fo:padding-right="0.29cm" fo:wrap-option="wrap" draw:shadow="visible" draw:shadow-offset-x="0.212cm" draw:shadow-offset-y="0.212cm" draw:shadow-color="#000000"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solid" svg:stroke-width="0.028cm" svg:stroke-color="#000000" draw:marker-start="" draw:marker-start-width="0.317cm" draw:marker-start-center="false" draw:marker-end="" draw:marker-end-width="0.317cm" draw:marker-end-center="false" draw:stroke-linejoin="miter" draw:fill="solid" draw:fill-color="#ff4000" draw:gradient-step-count="64" draw:textarea-horizontal-align="center" draw:textarea-vertical-align="middle" draw:auto-grow-height="false" draw:fit-to-size="false" style:shrink-to-fit="false" fo:min-height="3.522cm" fo:min-width="11.567cm" fo:padding-top="0.13cm" fo:padding-bottom="0.13cm" fo:padding-left="0.249cm" fo:padding-right="0.249cm" fo:wrap-option="wrap" draw:shadow="visible" draw:shadow-offset-x="0.212cm" draw:shadow-offset-y="0cm" draw:shadow-color="#000000" style:writing-mode="lr-tb" loext:decorative="false"/>
      <style:paragraph-properties style:writing-mode="lr-tb"/>
    </style:style>
    <style:style style:name="gr5"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3.204cm" fo:min-width="13.94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10"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2"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3"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none" draw:fill-color="#ffffff"/>
      <style:text-properties style:font-name="Comic Sans MS"/>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6"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8" style:family="paragraph">
      <loext:graphic-properties draw:fill-color="#ffffff"/>
      <style:text-properties fo:font-size="20pt"/>
    </style:style>
    <style:style style:name="P9" style:family="paragraph">
      <style:text-properties fo:color="#000000" loext:opacity="100%" fo:font-weight="bold" fo:background-color="transparent" style:font-weight-asian="bold" style:font-weight-complex="bold"/>
    </style:style>
    <style:style style:name="P10" style:family="paragraph">
      <loext:graphic-properties draw:fill="none" draw:fill-color="#ffffff"/>
      <style:text-properties fo:color="#000000" loext:opacity="100%" style:font-name="Fira Code" fo:font-size="16pt" fo:font-weight="bold" fo:background-color="transparent" style:font-size-asian="16pt" style:font-weight-asian="bold" style:font-size-complex="16pt" style:font-weight-complex="bold"/>
    </style:style>
    <style:style style:name="P11" style:family="paragraph">
      <style:text-properties style:font-name="Comic Sans MS"/>
    </style:style>
    <style:style style:name="P12" style:family="paragraph">
      <loext:graphic-properties draw:fill="none" draw:fill-color="#ffffff"/>
    </style:style>
    <style:style style:name="P13" style:family="paragraph">
      <loext:graphic-properties draw:fill="none" draw:fill-color="#ffffff"/>
      <style:text-properties style:font-name="Comic Sans MS" fo:font-size="21pt" style:font-size-asian="21pt" style:font-size-complex="21pt"/>
    </style:style>
    <style:style style:name="P14" style:family="paragraph">
      <style:paragraph-properties fo:text-align="center"/>
    </style:style>
    <style:style style:name="P15" style:family="paragraph">
      <style:paragraph-properties fo:text-align="center" style:writing-mode="lr-tb"/>
    </style:style>
    <style:style style:name="P16"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2" style:family="text">
      <style:text-properties style:font-name="Comic Sans MS"/>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4" style:family="text">
      <style:text-properties fo:color="#000000" loext:opacity="100%" style:font-name="Fira Code" fo:font-size="16pt" fo:font-weight="bold" fo:background-color="transparent" style:font-size-asian="16pt" style:font-weight-asian="bold" style:font-size-complex="16pt" style:font-weight-complex="bold"/>
    </style:style>
    <style:style style:name="T5" style:family="text">
      <style:text-properties style:font-name="Comic Sans MS" fo:font-size="21pt" style:font-size-asian="21pt" style:font-size-complex="21pt"/>
    </style:style>
    <style:style style:name="T6"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custom-shape draw:style-name="gr1" draw:text-style-name="P3" draw:layer="layout" svg:width="12.7cm" svg:height="2.51cm" svg:x="4.445cm" svg:y="10.19cm">
          <text:p text:style-name="P2"><text:span text:style-name="T1">Slipshow</text:span></text:p>
          <draw:enhanced-geometry svg:viewBox="0 0 21600 21600" draw:mirror-horizontal="false" draw:mirror-vertical="false" draw:extrusion="false" draw:extrusion-diffusion="100%" draw:extrusion-skew="50 -135" draw:text-areas="0 0 21600 21600" draw:text-path="true" draw:text-path-mode="shape" draw:text-path-scale="path" draw:text-path-same-letter-heights="true" draw:type="fontwork-inflate" draw:modifiers="29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2" draw:text-style-name="P4" draw:layer="layout" svg:width="13.97cm" svg:height="3.175cm" svg:x="17.78cm" svg:y="12.065cm">
          <draw:text-box>
            <text:p><text:span text:style-name="T2">Campus du libre 2024</text:span></text:p>
          </draw:text-box>
        </draw:frame>
        <draw:frame draw:style-name="gr3" draw:text-style-name="P4" draw:layer="layout" svg:width="8.89cm" svg:height="1.27cm" svg:x="2.54cm" svg:y="12.7cm">
          <draw:text-box>
            <text:p><text:span text:style-name="T2">Paul-Elliot Anglès d’Auriac</text:span></text:p>
          </draw:text-box>
        </draw:frame>
        <draw:custom-shape draw:style-name="gr4" draw:text-style-name="P6" draw:layer="layout" svg:width="12.065cm" svg:height="3.781cm" svg:x="12.7cm" svg:y="3.204cm">
          <text:p text:style-name="P5"><text:span text:style-name="T3">Slipshow</text:span></text:p>
          <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diffusion="0%" draw:extrusion-specularity="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style-name="gr5" draw:text-style-name="P7" draw:layer="layout" svg:width="14.513cm" svg:height="3.537cm" svg:x="0.727cm" svg:y="6.018cm">
          <text:p text:style-name="P5"><text:span text:style-name="T3">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6" draw:layer="layout" svg:width="17cm" svg:height="9.56cm" svg:x="2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1" draw:master-page-name="Sunset" presentation:presentation-page-layout-name="AL2T1">
        <office:forms form:automatic-focus="false" form:apply-design-mode="false"/>
        <draw:frame draw:style-name="gr7" draw:text-style-name="P10" draw:layer="layout" svg:width="12.065cm" svg:height="10.378cm" svg:x="13.97cm" svg:y="9.525cm">
          <draw:text-box>
            <text:p xml:id="id7" text:id="id7" text:style-name="P9"><text:span text:style-name="T4"># Ceci est un titre</text:span></text:p>
            <text:p text:style-name="P9"><text:span text:style-name="T4"/></text:p>
            <text:p xml:id="id8" text:id="id8" text:style-name="P9"><text:span text:style-name="T4">Et ceci est un paragraphe.</text:span></text:p>
            <text:p text:style-name="P9"><text:span text:style-name="T4"/></text:p>
            <text:p xml:id="id9" text:id="id9" text:style-name="P9"><text:span text:style-name="T4">- Et ceci est une liste à points</text:span></text:p>
            <text:p xml:id="id10" text:id="id10" text:style-name="P9"><text:span text:style-name="T4">- Avec plusieurs points</text:span></text:p>
            <text:p text:style-name="P9"><text:span text:style-name="T4"/></text:p>
            <text:p xml:id="id11" text:id="id11" text:style-name="P9"><text:span text:style-name="T4">On peut aussi mettre du texte en gras, comme dans l’exemple : **comme ceci**.</text:span></text:p>
            <text:p xml:id="id12" text:id="id12" text:style-name="P9"><text:span text:style-name="T4">L’italique a _aussi_ une syntaxe.</text:span></text:p>
          </draw:text-box>
        </draw:frame>
        <draw:frame presentation:style-name="pr3" draw:text-style-name="P11" draw:layer="layout" svg:width="10cm" svg:height="2.5cm" svg:x="7.78cm" svg:y="0.675cm" presentation:class="title" presentation:user-transformed="true">
          <draw:text-box>
            <text:p xml:id="id13" text:id="id13"><text:span text:style-name="T2">Slipshow</text:span></text:p>
          </draw:text-box>
        </draw:frame>
        <draw:frame presentation:style-name="pr4" draw:text-style-name="P11" draw:layer="layout" svg:width="30.52cm" svg:height="1.715cm" svg:x="2.04cm" svg:y="4cm" presentation:class="outline" presentation:user-transformed="true">
          <draw:text-box>
            <text:list text:style-name="L3">
              <text:list-item>
                <text:p xml:id="id1" text:id="id1"><text:span text:style-name="T2">Slipshow est un logiciel libre pour faire des présentations améliorées</text:span></text:p>
                <text:p><text:span text:style-name="T2"/></text:p>
              </text:list-item>
            </text:list>
          </draw:text-box>
        </draw:frame>
        <draw:frame draw:style-name="gr8" draw:text-style-name="P4" draw:layer="layout" svg:width="22.225cm" svg:height="2.54cm" svg:x="1.905cm" svg:y="5.08cm">
          <draw:text-box>
            <text:p xml:id="id2" text:id="id2"><text:span text:style-name="T2">- Avec slipshow, pas besoin de gérer l’alignement du texte !</text:span></text:p>
          </draw:text-box>
        </draw:frame>
        <draw:frame draw:style-name="gr8" draw:text-style-name="P12" draw:layer="layout" svg:width="17.78cm" svg:height="2.54cm" svg:x="3.175cm" svg:y="6.35cm">
          <draw:text-box>
            <text:p xml:id="id3" text:id="id3">- &lt;Incorrect Libreoffice version: unsupported block&gt;</text:p>
          </draw:text-box>
        </draw:frame>
        <draw:frame draw:style-name="gr9" draw:text-style-name="P13" draw:layer="layout" svg:width="19.05cm" svg:height="6.35cm" svg:x="2.54cm" svg:y="7.62cm">
          <draw:text-box>
            <text:p xml:id="id5" text:id="id5"><text:span text:style-name="T5">Une présentation slipshow est écrite </text:span><text:span text:style-name="T6">dans un fichier texte.</text:span></text:p>
          </draw:text-box>
        </draw:frame>
        <draw:custom-shape draw:style-name="gr10" draw:text-style-name="P15" xml:id="id4" draw:id="id4" draw:layer="layout" svg:width="12.7cm" svg:height="9.525cm" svg:x="13.335cm" svg:y="7.62cm">
          <text:p text:style-name="P14"/>
          <draw:enhanced-geometry svg:viewBox="0 0 21600 21600" draw:type="rectangle" draw:enhanced-path="M 0 0 L 21600 0 21600 21600 0 21600 0 0 Z N"/>
        </draw:custom-shape>
        <draw:frame draw:style-name="gr11" draw:text-style-name="P4" draw:layer="layout" svg:width="11.43cm" svg:height="2.021cm" svg:x="13.97cm" svg:y="8.255cm">
          <draw:text-box>
            <text:p xml:id="id6" text:id="id6"><text:span text:style-name="T2">Exemple:</text:span></text:p>
            <text:p><text:span text:style-name="T2"/></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2" anim:sub-item="text" smil:attributeName="visibility" smil:to="visible"/>
                  <anim:transitionFilter smil:begin="0s" smil:dur="0.725s" smil:targetElement="id2" anim:sub-item="text" smil:type="barWipe" smil:subtype="topToBottom"/>
                  <anim:animate smil:begin="0s" smil:dur="2.2775s" smil:targetElement="id2" anim:sub-item="text" smil:attributeName="x" smil:values="x-0.25;x" smil:keyTimes="0;1" smil:keySplines="0,0;0.14,0.36;0.43,0.73;0.71,0.91;1,1"/>
                  <anim:animate smil:begin="0s" smil:dur="0.83s" smil:targetElement="id2" anim:sub-item="text" smil:attributeName="y" smil:values="0.5;1" smil:keyTimes="0;1" anim:formula="y-sin(pi*$)/3" smil:keySplines="0,0;0.25,0.07;0.5,0.2;0.75,0.467;1,1"/>
                  <anim:animate smil:begin="0.83s" smil:dur="0.83s" smil:targetElement="id2" anim:sub-item="text" smil:attributeName="y" smil:values="0;1" smil:keyTimes="0;1" anim:formula="y-sin(pi*$)/9" smil:keySplines="0,0;0.125,0.2665;0.25,0.4;0.375,0.465;0.5,0.5;0.625,0.535;0.75,0.6;0.875,0.7335;1,1"/>
                  <anim:animate smil:begin="1.655s" smil:dur="0.415s" smil:targetElement="id2" anim:sub-item="text" smil:attributeName="y" smil:values="0;1" smil:keyTimes="0;1" anim:formula="y-sin(pi*$)/27" smil:keySplines="0,0;0.125,0.2665;0.25,0.4;0.375,0.465;0.5,0.5;0.625,0.535;0.75,0.6;0.875,0.7335;1,1"/>
                  <anim:animate smil:begin="2.07s" smil:dur="0.205s" smil:targetElement="id2" anim:sub-item="text" smil:attributeName="y" smil:values="0;1" smil:keyTimes="0;1" anim:formula="y-sin(pi*$)/81" smil:keySplines="0,0;0.125,0.2665;0.25,0.4;0.375,0.465;0.5,0.5;0.625,0.535;0.75,0.6;0.875,0.7335;1,1"/>
                  <anim:animateTransform smil:begin="0.8125s" smil:dur="0.0325s" smil:targetElement="id2" anim:sub-item="text" smil:to="1,0.6" smil:attributeName="transform" svg:type="scale"/>
                  <anim:animateTransform smil:begin="0.845s" smil:dur="0.2075s" smil:decelerate="0.5" smil:targetElement="id2" anim:sub-item="text" smil:to="1,1" smil:attributeName="transform" svg:type="scale"/>
                  <anim:animateTransform smil:begin="1.64s" smil:dur="0.0325s" smil:targetElement="id2" anim:sub-item="text" smil:to="1,0.8" smil:attributeName="transform" svg:type="scale"/>
                  <anim:animateTransform smil:begin="1.6725s" smil:dur="0.2075s" smil:decelerate="0.5" smil:targetElement="id2" anim:sub-item="text" smil:to="1,1" smil:attributeName="transform" svg:type="scale"/>
                  <anim:animateTransform smil:begin="2.0525s" smil:dur="0.0325s" smil:targetElement="id2" anim:sub-item="text" smil:to="1,0.9" smil:attributeName="transform" svg:type="scale"/>
                  <anim:animateTransform smil:begin="2.085s" smil:dur="0.2075s" smil:decelerate="0.5" smil:targetElement="id2" anim:sub-item="text" smil:to="1,1" smil:attributeName="transform" svg:type="scale"/>
                  <anim:animateTransform smil:begin="2.26s" smil:dur="0.0325s" smil:targetElement="id2" anim:sub-item="text" smil:to="1,0.95" smil:attributeName="transform" svg:type="scale"/>
                  <anim:animateTransform smil:begin="2.2925s" smil:dur="0.2075s" smil:decelerate="0.5" smil:targetElement="id2"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3" anim:sub-item="text" smil:attributeName="visibility" smil:to="visible"/>
                  <anim:animate smil:begin="0s" smil:dur="0.6s" smil:fill="hold" smil:targetElement="id3" anim:sub-item="text" smil:attributeName="x" smil:from="(-width/2)" smil:to="(x)"/>
                  <anim:animate smil:begin="0.6s" smil:dur="0.2s" smil:fill="hold" smil:decelerate="0.5" smil:autoReverse="true" smil:targetElement="id3" anim:sub-item="text" smil:attributeName="skewX" smil:from="0" smil:to="-1"/>
                  <anim:animateTransform smil:begin="0.6s" smil:dur="0.2s" smil:fill="hold" smil:decelerate="1" smil:autoReverse="true" smil:targetElement="id3" anim:sub-item="text" smil:from="1,1" smil:to="0.8,1" smil:attributeName="transform" svg:type="scale"/>
                  <anim:animate smil:begin="0.6s" smil:dur="0.2s" smil:fill="hold" smil:decelerate="1" smil:autoReverse="true" smil:targetElement="id3"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4" smil:attributeName="visibility" smil:to="visible"/>
                  <anim:transitionFilter smil:dur="2s" smil:targetElement="id4" smil:type="fade" smil:subtype="crossfade"/>
                  <anim:animate smil:dur="2s" smil:fill="hold" smil:targetElement="id4" smil:attributeName="rotate" smil:values="720;0" smil:keyTimes="0;1"/>
                  <anim:animate smil:dur="2s" smil:fill="hold" smil:targetElement="id4" smil:attributeName="height" smil:values="0;height" smil:keyTimes="0;1"/>
                  <anim:animate smil:dur="2s" smil:fill="hold" smil:targetElement="id4"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5"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6" anim:sub-item="text" smil:attributeName="visibility" smil:to="visible"/>
                  <anim:set smil:begin="0s" smil:dur="1.365s" smil:fill="hold" smil:targetElement="id6" anim:sub-item="text" smil:attributeName="rotate" smil:to="-45"/>
                  <anim:animate smil:begin="1.365s" smil:dur="1.365s" smil:fill="hold" smil:targetElement="id6" anim:sub-item="text" smil:attributeName="rotate" smil:values="-45;45;0" smil:keyTimes="0;0.699;1"/>
                  <anim:animate smil:begin="0s" smil:dur="1.365s" smil:fill="hold" smil:targetElement="id6" anim:sub-item="text" smil:attributeName="y" smil:values="y-1;y-(0.354*width-0.172*height)" smil:keyTimes="0;1"/>
                  <anim:animate smil:begin="1.365s" smil:dur="0.468s" smil:fill="hold" smil:decelerate="0.5" smil:autoReverse="true" smil:targetElement="id6" anim:sub-item="text" smil:attributeName="y" smil:values="y-(0.354*width-0.172*height);y-(0.354*width-0.172*height)-height/2" smil:keyTimes="0;1"/>
                  <anim:animate smil:begin="2.592s" smil:dur="0.408s" smil:fill="hold" smil:targetElement="id6"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4625s" smil:fill="hold" smil:targetElement="id7" anim:sub-item="text" smil:attributeName="visibility" smil:to="visible"/>
                  <anim:animate smil:begin="0s" smil:dur="2.775s" smil:fill="hold" smil:targetElement="id7" anim:sub-item="text" smil:attributeName="x" smil:from="(-width/2)" smil:to="(x)"/>
                  <anim:animate smil:begin="2.775s" smil:dur="0.925s" smil:fill="hold" smil:decelerate="0.5" smil:autoReverse="true" smil:targetElement="id7" anim:sub-item="text" smil:attributeName="skewX" smil:from="0" smil:to="-1"/>
                  <anim:animateTransform smil:begin="2.775s" smil:dur="0.925s" smil:fill="hold" smil:decelerate="1" smil:autoReverse="true" smil:targetElement="id7" anim:sub-item="text" smil:from="1,1" smil:to="0.8,1" smil:attributeName="transform" svg:type="scale"/>
                  <anim:animate smil:begin="2.775s" smil:dur="0.925s" smil:fill="hold" smil:decelerate="1" smil:autoReverse="true" smil:targetElement="id7"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8" anim:sub-item="text" smil:attributeName="visibility" smil:to="visible"/>
                  <anim:animate smil:begin="0s" smil:dur="2.775s" smil:fill="hold" smil:targetElement="id8" anim:sub-item="text" smil:attributeName="x" smil:from="(-width/2)" smil:to="(x)"/>
                  <anim:animate smil:begin="2.775s" smil:dur="0.925s" smil:fill="hold" smil:decelerate="0.5" smil:autoReverse="true" smil:targetElement="id8" anim:sub-item="text" smil:attributeName="skewX" smil:from="0" smil:to="-1"/>
                  <anim:animateTransform smil:begin="2.775s" smil:dur="0.925s" smil:fill="hold" smil:decelerate="1" smil:autoReverse="true" smil:targetElement="id8" anim:sub-item="text" smil:from="1,1" smil:to="0.8,1" smil:attributeName="transform" svg:type="scale"/>
                  <anim:animate smil:begin="2.775s" smil:dur="0.925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9" anim:sub-item="text" smil:attributeName="visibility" smil:to="visible"/>
                  <anim:animate smil:begin="0s" smil:dur="2.775s" smil:fill="hold" smil:targetElement="id9" anim:sub-item="text" smil:attributeName="x" smil:from="(-width/2)" smil:to="(x)"/>
                  <anim:animate smil:begin="2.775s" smil:dur="0.925s" smil:fill="hold" smil:decelerate="0.5" smil:autoReverse="true" smil:targetElement="id9" anim:sub-item="text" smil:attributeName="skewX" smil:from="0" smil:to="-1"/>
                  <anim:animateTransform smil:begin="2.775s" smil:dur="0.925s" smil:fill="hold" smil:decelerate="1" smil:autoReverse="true" smil:targetElement="id9" anim:sub-item="text" smil:from="1,1" smil:to="0.8,1" smil:attributeName="transform" svg:type="scale"/>
                  <anim:animate smil:begin="2.775s" smil:dur="0.925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0" anim:sub-item="text" smil:attributeName="visibility" smil:to="visible"/>
                  <anim:animate smil:begin="0s" smil:dur="2.775s" smil:fill="hold" smil:targetElement="id10" anim:sub-item="text" smil:attributeName="x" smil:from="(-width/2)" smil:to="(x)"/>
                  <anim:animate smil:begin="2.775s" smil:dur="0.925s" smil:fill="hold" smil:decelerate="0.5" smil:autoReverse="true" smil:targetElement="id10" anim:sub-item="text" smil:attributeName="skewX" smil:from="0" smil:to="-1"/>
                  <anim:animateTransform smil:begin="2.775s" smil:dur="0.925s" smil:fill="hold" smil:decelerate="1" smil:autoReverse="true" smil:targetElement="id10" anim:sub-item="text" smil:from="1,1" smil:to="0.8,1" smil:attributeName="transform" svg:type="scale"/>
                  <anim:animate smil:begin="2.775s" smil:dur="0.925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1" anim:sub-item="text" smil:attributeName="visibility" smil:to="visible"/>
                  <anim:animate smil:begin="0s" smil:dur="2.775s" smil:fill="hold" smil:targetElement="id11" anim:sub-item="text" smil:attributeName="x" smil:from="(-width/2)" smil:to="(x)"/>
                  <anim:animate smil:begin="2.775s" smil:dur="0.925s" smil:fill="hold" smil:decelerate="0.5" smil:autoReverse="true" smil:targetElement="id11" anim:sub-item="text" smil:attributeName="skewX" smil:from="0" smil:to="-1"/>
                  <anim:animateTransform smil:begin="2.775s" smil:dur="0.925s" smil:fill="hold" smil:decelerate="1" smil:autoReverse="true" smil:targetElement="id11" anim:sub-item="text" smil:from="1,1" smil:to="0.8,1" smil:attributeName="transform" svg:type="scale"/>
                  <anim:animate smil:begin="2.775s" smil:dur="0.925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4625s" smil:fill="hold" smil:targetElement="id12" anim:sub-item="text" smil:attributeName="visibility" smil:to="visible"/>
                  <anim:animate smil:begin="0s" smil:dur="2.775s" smil:fill="hold" smil:targetElement="id12" anim:sub-item="text" smil:attributeName="x" smil:from="(-width/2)" smil:to="(x)"/>
                  <anim:animate smil:begin="2.775s" smil:dur="0.925s" smil:fill="hold" smil:decelerate="0.5" smil:autoReverse="true" smil:targetElement="id12" anim:sub-item="text" smil:attributeName="skewX" smil:from="0" smil:to="-1"/>
                  <anim:animateTransform smil:begin="2.775s" smil:dur="0.925s" smil:fill="hold" smil:decelerate="1" smil:autoReverse="true" smil:targetElement="id12" anim:sub-item="text" smil:from="1,1" smil:to="0.8,1" smil:attributeName="transform" svg:type="scale"/>
                  <anim:animate smil:begin="2.775s" smil:dur="0.925s" smil:fill="hold" smil:decelerate="1" smil:autoReverse="true" smil:targetElement="id12" anim:sub-item="text" smil:attributeName="x" smil:by="(height/3+width*0.1)" smil:additive="sum"/>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5s" smil:fill="hold" smil:targetElement="id13" anim:sub-item="text" smil:by="5,5" smil:attributeName="transform" svg:type="scale"/>
                </anim:par>
                <anim:par smil:begin="8s" smil:fill="remove" smil:repeatCount="indefinite" presentation:preset-property="CharHeight" presentation:text-only="true" presentation:node-type="with-previous" presentation:preset-class="emphasis" presentation:preset-id="ooo-emphasis-font-size" presentation:preset-sub-type="2">
                  <anim:animate smil:dur="4.5s" smil:fill="hold" smil:targetElement="id1" anim:sub-item="text" smil:attributeName="font-size" smil:to="200%"/>
                </anim:par>
                <anim:par smil:begin="8s" smil:fill="hold" smil:repeatCount="indefinite" presentation:preset-property="Rotate;Accelerate;Decelerate;AutoReverse" presentation:node-type="with-previous" presentation:preset-class="emphasis" presentation:preset-id="ooo-emphasis-spin">
                  <anim:animateTransform smil:dur="5s" smil:fill="hold" smil:targetElement="id2" anim:sub-item="text" smil:by="360" smil:attributeName="transform" svg:type="rotate"/>
                </anim:par>
                <anim:par smil:begin="6s" smil:fill="hold" smil:accelerate="0.5" smil:decelerate="0.5" smil:repeatCount="indefinite" presentation:node-type="with-previous" presentation:preset-class="motion-path" presentation:preset-id="libo-motionpath-freeform-line">
                  <anim:animateMotion smil:dur="5.5s" smil:fill="hold" smil:targetElement="id2"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8s" smil:fill="hold" smil:accelerate="0.5" smil:decelerate="0.5" smil:repeatCount="indefinite" presentation:node-type="with-previous" presentation:preset-class="motion-path" presentation:preset-id="libo-motionpath-freeform-line">
                  <anim:animateMotion smil:dur="3.5s" smil:fill="hold" smil:targetElement="id3"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7.5s" smil:fill="hold" smil:accelerate="0.5" smil:decelerate="0.5" smil:repeatCount="indefinite" presentation:node-type="with-previous" presentation:preset-class="motion-path" presentation:preset-id="libo-motionpath-freeform-line">
                  <anim:animateMotion smil:dur="6s" smil:fill="hold" smil:targetElement="id1"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8s" smil:fill="hold" smil:repeatCount="indefinite" presentation:preset-property="Rotate;Accelerate;Decelerate;AutoReverse" presentation:node-type="with-previous" presentation:preset-class="emphasis" presentation:preset-id="ooo-emphasis-spin">
                  <anim:animateTransform smil:dur="2s" smil:fill="hold" smil:targetElement="id1" anim:sub-item="text" smil:by="360" smil:attributeName="transform" svg:type="rotate"/>
                </anim:par>
                <anim:par smil:begin="7.5s" smil:fill="hold" smil:accelerate="0.5" smil:decelerate="0.5" smil:repeatCount="indefinite" presentation:preset-property="Color" presentation:node-type="with-previous" presentation:preset-class="emphasis" presentation:preset-id="ooo-emphasis-teeter">
                  <anim:animateColor smil:dur="0.1s" smil:fill="hold" smil:targetElement="id5" anim:sub-item="text" smil:attributeName="color" smil:to="#333399" anim:color-interpolation="rgb" anim:color-interpolation-direction="clockwise"/>
                  <anim:animateColor smil:dur="0.1s" smil:fill="hold" smil:targetElement="id5" anim:sub-item="text" smil:attributeName="fill-color" smil:to="#333399" anim:color-interpolation="rgb" anim:color-interpolation-direction="clockwise"/>
                  <anim:set smil:dur="0.1s" smil:fill="hold" smil:targetElement="id5" anim:sub-item="text" smil:attributeName="fill" smil:to="solid"/>
                  <anim:animateTransform smil:begin="0s" smil:dur="0.1s" smil:fill="hold" smil:targetElement="id5" anim:sub-item="text" smil:by="2" smil:attributeName="transform" svg:type="rotate"/>
                  <anim:animateTransform smil:begin="0.2s" smil:dur="0.2s" smil:fill="hold" smil:targetElement="id5" anim:sub-item="text" smil:by="-4" smil:attributeName="transform" svg:type="rotate"/>
                  <anim:animateTransform smil:begin="0.4s" smil:dur="0.2s" smil:fill="hold" smil:targetElement="id5" anim:sub-item="text" smil:by="4" smil:attributeName="transform" svg:type="rotate"/>
                  <anim:animateTransform smil:begin="0.6s" smil:dur="0.2s" smil:fill="hold" smil:targetElement="id5" anim:sub-item="text" smil:by="-4" smil:attributeName="transform" svg:type="rotate"/>
                  <anim:animateTransform smil:begin="0.8s" smil:dur="0.2s" smil:fill="hold" smil:targetElement="id5" anim:sub-item="text" smil:by="2" smil:attributeName="transform" svg:type="rotate"/>
                </anim:par>
                <anim:par smil:begin="9.5s" smil:fill="hold" smil:accelerate="0.5" smil:decelerate="0.5" smil:repeatCount="indefinite" presentation:node-type="with-previous" presentation:preset-class="motion-path" presentation:preset-id="libo-motionpath-freeform-line">
                  <anim:animateMotion smil:dur="5s" smil:fill="hold" smil:targetElement="id5" anim:sub-item="text" svg:path="M-0.23325-0.0753650793650794c-0.0256071428571429-0.0340952380952381-0.0518670237519089-0.0723756601173202-0.0615357142857143-0.129460317460317-0.0067955962896602-0.040121698412031-0.0224794501325387-0.0757459628968092-0.0225357142857143-0.120190476190476-5.0878725764425E-005-0.0401904245593854-0.0021472384412346-0.081081958051057 0.00517857142857142-0.120190476190476 0.00506704762838056-0.0270502139162219 0.0132949086240995-0.05141665520377 0.0225357142857143-0.073968253968254 0.0085806279538026-0.0209404770371133 0.0244268557029759-0.060883995614497 0.0390357142857143-0.0446984126984127 0.0327839989350053 0.0363223540072001 0.0165410278479765 0.131108241259447 0.026 0.18647619047619 0.00836245671280145 0.0489495128181081 0.000358478913183025 0.102539200322095 0.00607142857142856 0.152571428571429 0.00396562178603815 0.0347296766501743 0.00317759536596549 0.0686350225631969 0.00432142857142859 0.103238095238095 0.000999023940478849 0.0302223242438199 0.00154882948934346 0.0604379608712225 0.00607142857142856 0.0893968253968254 0.00354883282408591 0.0227236965097812 0.00225648248594101 0.0473562675856679 0.0103928571428571 0.0662857142857143 0.00875648539624743 0.0203721473724301 0.0299705882700718 0.0326449232259149 0.0425 0.00768253968253968 0.0194348760610596-0.0387201602765841 0.0314505492999371-0.0894586635542992 0.0294642857142857-0.141777777777778-0.0019065939989916-0.0502205799530513-0.00239421272534726-0.100952658961845 0.000857142857142848-0.151047619047619 0.00253435871181312-0.0390478971894168 0.00296063562460983-0.0782871568650561 0.00782142857142858-0.117142857142857 0.00521063575562267-0.0416522372774124 0.0304201006223724-0.06133949397289 0.039-0.0986031746031746 0.0108486733054638-0.0471172771992203 0.0584968918238057-0.0882543115003209 0.0546071428571429 0.0231111111111111-0.00225310818924838 0.064507593635329 0.00521034018346752 0.128635763016426 0.00953571428571429 0.192634920634921 0.00363891166889555 0.0538421130640367 0.00707933212202923 0.107746099536847 0.00692857142857143 0.16184126984127-6.35250379827992E-005 0.022793724739901-0.00424478022775858 0.0481199470499247 0.0035 0.0662857142857143 0.0127195071129154 0.0298342365789849 0.0285709143619038 0.0538428611148444 0.0467857142857143 0.0724444444444444 0.0139280572698026 0.0142238135476305 0.0342797706188606 0.02398880138017 0.0476785714285714 0.00152380952380952 0.0267797728414457-0.0449000912351984 0.0233566569165908-0.116317439996824 0.0225714285714286-0.17568253968254-0.00057191451217796-0.0432380749323756-0.000142027375437143-0.086412744128239-0.00089285714285714-0.129460317460317-0.000534884519353976-0.0306667124429609 0.00284490402654417-0.0608919264912818 0.00521428571428571-0.090984126984127 0.00209490534624579-0.0266062289663647 0.00800004543353643-0.0524443647881416 0.0182142857142857-0.0708571428571429 0.0178571882908337-0.0321903965344518 0.0185692578873561-0.0814021195994941 0.039-0.107873015873016 0.0178906869237204-0.0231798979796614 0.0337458368608881-0.0646099982748078 0.0598214285714286-0.0508571428571428 0.0158172754147627 0.00834238794254039 0.0335758588459769 0.0133243182602619 0.0468214285714286 0.0339047619047619 0.0309687173742401 0.0481179712065019 0.0330397946498289 0.13085837240165 0.0268571428571429 0.19568253968254-0.00638877685491235 0.0669853573272621-0.00292164232828912 0.132823277822172 0.0034642857142857 0.198857142857143 0.00354264369741369 0.0366328048519132-0.0113624790118428 0.0467347887376797-0.0034642857142857 0.0754920634920635 0.0114232360006368 0.0415919342409712 0.00736347094349782 0.0890739800393158 0.0190714285714286 0.132571428571429 0.0117563288680057 0.043677157546482 0.043185741619067 0.0529729309775373 0.0632857142857143 0.0307936507936508 0.0171857488278751-0.0189635849135173 0.0354291722211242-0.0309833012024685 0.0494285714285714-0.0631746031746032 0.0209291722339845-0.0481261583748972 0.0221704685194236-0.105781204796043 0.0294642857142857-0.160253968253968 0.00781332615536601-0.058352637050004-0.00307174507242547-0.113333464794954 0.00432142857142859-0.169587301587302 0.00689254064262668-0.0524445759118978 0.0569288247186699-0.110222736968166 0.0346785714285715-0.144825396825397-0.0376426038557561-0.0585401972902875-0.0887141925978238 0.0556194606163834-0.13175 0.0862857142857142-0.0610356211703215 0.0434924764901611-0.11277842168395 0.120030067503151-0.173392857142857 0.16647619047619-0.016528432698079 0.012664996577705-0.0344317021395253 0.013194242459764-0.0502857142857143 0.0261587301587302-0.0898959895740353 0.0735117041839234-0.189211604370966 0.0735365126035853-0.28 0.134095238095238-0.0397116052950438 0.0264888941723555-0.0810341606419258 0.0622546148396082-0.123964285714286 0.0554920634920635-0.0106770356803821-0.001681895915897-0.0355919732069466 0.0192438153973309-0.0303571428571429-0.0246984126984127 0.00297945808282191-0.0250101756749343 0.0181785714285714-0.0344761904761905 0.02775-0.0508571428571429l0.013-0.0169523809523809 0.0034642857142857-0.00457142857142857z"/>
                </anim:par>
                <anim:par smil:begin="11s" smil:fill="hold" smil:repeatCount="indefinite" presentation:preset-property="Rotate;Accelerate;Decelerate;AutoReverse" presentation:node-type="with-previous" presentation:preset-class="emphasis" presentation:preset-id="ooo-emphasis-spin">
                  <anim:animateTransform smil:dur="12s" smil:fill="hold" smil:targetElement="id5" anim:sub-item="text" smil:by="360" smil:attributeName="transform" svg:type="rotate"/>
                </anim:par>
                <anim:par smil:begin="10s" smil:fill="hold" smil:repeatCount="indefinite" presentation:text-only="true" presentation:node-type="with-previous" presentation:preset-class="emphasis" presentation:preset-id="ooo-emphasis-wave">
                  <anim:animateMotion smil:begin="0s" smil:dur="3.5s" smil:fill="hold" smil:accelerate="0.5" smil:decelerate="0.5" smil:autoReverse="true" smil:targetElement="id13" anim:sub-item="text" svg:path="M 0.0 0.0 L 0.0 -0.07213"/>
                  <anim:animateTransform smil:begin="0s" smil:dur="1.75s" smil:fill="hold" smil:targetElement="id13" anim:sub-item="text" smil:by="25" smil:attributeName="transform" svg:type="rotate"/>
                  <anim:animateTransform smil:begin="1.75s" smil:dur="1.75s" smil:fill="hold" smil:targetElement="id13" anim:sub-item="text" smil:by="-25" smil:attributeName="transform" svg:type="rotate"/>
                  <anim:animateTransform smil:begin="3.5s" smil:dur="1.75s" smil:fill="hold" smil:targetElement="id13" anim:sub-item="text" smil:by="-25" smil:attributeName="transform" svg:type="rotate"/>
                  <anim:animateTransform smil:begin="5.25s" smil:dur="1.75s" smil:fill="hold" smil:targetElement="id13" anim:sub-item="text" smil:by="25" smil:attributeName="transform" svg:type="rotate"/>
                </anim:par>
                <anim:par smil:begin="9.5s" smil:fill="hold" smil:repeatCount="indefinite" presentation:preset-property="Rotate;Accelerate;Decelerate;AutoReverse" presentation:node-type="with-previous" presentation:preset-class="emphasis" presentation:preset-id="ooo-emphasis-spin">
                  <anim:animateTransform smil:dur="0.5s" smil:fill="hold" smil:targetElement="id4" smil:by="360" smil:attributeName="transform" svg:type="rotate"/>
                </anim:par>
                <anim:par smil:begin="9s" smil:fill="hold" smil:accelerate="0.5" smil:decelerate="0.5" smil:repeatCount="indefinite" presentation:node-type="with-previous" presentation:preset-class="motion-path" presentation:preset-id="libo-motionpath-freeform-line">
                  <anim:animateMotion smil:dur="5.5s" smil:fill="hold" smil:targetElement="id4" svg:path="M0.171678571428571-0.013968253968254c-0.00925000000000001-0.127365079365079 0.0070787278188291-0.253777486325518 0.00867857142857145-0.380698412698413 0.000400156432049686-0.0317457436092722 0.00498913899911113-0.0636164432751312 0.00257142857142856-0.0955555555555556-0.00197514769784124-0.0260926467328191-0.00307601497663226-0.0517458209521516-0.00346428571428573-0.0786031746031746-0.000397443583433688-0.0274918551449873 0.00689505286966455-0.0497161477140792-0.000857142857142834-0.0786031746031746-0.00489066159900722-0.0182240849037708 0.0053262039939678-0.0475026185243029-0.00346428571428573-0.0600634920634922-0.0405309413043898-0.0579153204252928-0.104785728834801-0.014667223784993-0.151714285714286-0.0107936507936508-0.0546071574081755 0.00450737938977086-0.0907486124078096-0.0674841192646827-0.140428571428571-0.040063492063492-0.0492486128115266 0.0271825476248138-0.100926912537086 0.0413666865604392-0.151714285714286 0.0493333333333333-0.0317840643968633 0.00498573559166482-0.0637847202028344 0.000149993150894812-0.09625 0.00457142857142856-0.0369990107608182 0.0050388826994453-0.0716070697634515-0.0357173717430486-0.109214285714286-0.0354285714285714-0.0285356492012834 0.000219136254965502-0.0569997795466729-0.00279094706872018-0.0858214285714286 0.00463492063492055-0.0204640653575978 0.00527254501967089-0.0411771710221172 0.0018622268357984-0.0615714285714286 0.00615873015873025-0.0139628936915498 0.00294159368137981-0.0365671026795704-0.0263512847790269-0.0259999999999999 0.0431746031746031 0.0120043260134132 0.0789820493540744 0.00197857618402397 0.162664418027823 0.00607142857142851 0.245015873015873 0.0028714337992608 0.0577755386435887 0.0062503383021395 0.120952592874397-0.00521428571428573 0.178793650793651-0.0145353759846834 0.0733335452609422-0.0201665377314225 0.151810678433059-0.0225357142857142 0.229650793650794-0.00141653797054864 0.046540845019785-0.0122128725328111 0.0900318205881431-0.013 0.137142857142857-0.000391443964752325 0.0234286461866582 0.0015572849590384 0.0462902892267952 0 0.0693333333333333-0.00672843198171169 0.0995601697830293 0.104644292106862 0.0108508713675395 0.138714285714286 0.0354920634920635 0.0391442924484424 0.028311189074906 0.0837171086574672 0.0250859210751134 0.124821428571429-0.0308571428571428 0.0225742519812212-0.030723603369469 0.0546435319312161-0.0313104470972134 0.0823571428571429-0.0246349206349207 0.0263221042796419 0.00634034677515061 0.0526437744810077 0.0358797857787511 0.0788928571428572 0.0246349206349207 0.0459294892007998-0.0196757699627595 0.0890697855109656-0.0579819437920678 0.13525-0.0754920634920635 0.0479269296288129-0.0181724204605644 0.0980001384967129-0.0253242340192057 0.14825-0.0277460317460317 0.0314287106027354-0.00151471024233177 0.0630692054288633-0.010802415069591 0.0918928571428572-0.0339047619047619 0.0133192067629292-0.0106754320118695 0.0288571428571429-0.00196825396825397 0.0398571428571429-0.0215873015873016l0.0104285714285714-0.0138412698412698 0.00432142857142856-0.00926984126984127"/>
                </anim:par>
                <anim:par smil:begin="10.5s" smil:fill="hold" smil:accelerate="0.5" smil:decelerate="0.5" smil:repeatCount="indefinite" presentation:node-type="with-previous" presentation:preset-class="motion-path" presentation:preset-id="libo-motionpath-freeform-line">
                  <anim:animateMotion smil:dur="2s" smil:fill="hold" smil:targetElement="id7"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8.5s" smil:fill="hold" smil:accelerate="0.5" smil:decelerate="0.5" smil:repeatCount="indefinite" presentation:node-type="with-previous" presentation:preset-class="motion-path" presentation:preset-id="libo-motionpath-freeform-line">
                  <anim:animateMotion smil:dur="2s" smil:fill="hold" smil:targetElement="id8"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s" smil:fill="hold" smil:accelerate="0.5" smil:decelerate="0.5" smil:repeatCount="indefinite" presentation:node-type="with-previous" presentation:preset-class="motion-path" presentation:preset-id="libo-motionpath-freeform-line">
                  <anim:animateMotion smil:dur="2s" smil:fill="hold" smil:targetElement="id9"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7.5s" smil:fill="hold" smil:accelerate="0.5" smil:decelerate="0.5" smil:repeatCount="indefinite" presentation:node-type="with-previous" presentation:preset-class="motion-path" presentation:preset-id="libo-motionpath-freeform-line">
                  <anim:animateMotion smil:dur="2s" smil:fill="hold" smil:targetElement="id10"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1.5s" smil:fill="hold" smil:accelerate="0.5" smil:decelerate="0.5" smil:repeatCount="indefinite" presentation:node-type="with-previous" presentation:preset-class="motion-path" presentation:preset-id="libo-motionpath-freeform-line">
                  <anim:animateMotion smil:dur="2s" smil:fill="hold" smil:targetElement="id11"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5s" smil:fill="hold" smil:accelerate="0.5" smil:decelerate="0.5" smil:repeatCount="indefinite" presentation:node-type="with-previous" presentation:preset-class="motion-path" presentation:preset-id="libo-motionpath-freeform-line">
                  <anim:animateMotion smil:dur="2s" smil:fill="hold" smil:targetElement="id12"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iterate smil:begin="10s" smil:fill="hold" presentation:preset-property="Color" presentation:text-only="true" presentation:node-type="with-previous" presentation:preset-class="emphasis" presentation:preset-id="ooo-emphasis-style-emphasis" smil:targetElement="id7"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8"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9"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0"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1"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2"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par>
            </anim:par>
          </anim:seq>
        </anim:par>
        <presentation:notes draw:style-name="dp2">
          <draw:page-thumbnail draw:style-name="gr6" draw:layer="layout" svg:width="17cm" svg:height="9.56cm" svg:x="2cm" svg:y="2.5cm" draw:page-number="2" presentation:class="page"/>
          <draw:frame presentation:style-name="pr2" draw:text-style-name="P16" draw:layer="layout" svg:width="17cm" svg:height="14cm" svg:x="2cm" svg:y="13cm" presentation:class="notes" presentation:placeholder="true">
            <draw:text-box/>
          </draw:frame>
        </presentation:notes>
      </draw:page>
      <draw:page draw:name="page3" draw:style-name="dp3" draw:master-page-name="Sunset" presentation:presentation-page-layout-name="AL2T1" xml:id="id14" draw:id="id14">
        <office:forms form:automatic-focus="false" form:apply-design-mode="false"/>
        <draw:frame presentation:style-name="pr3" draw:layer="layout" svg:width="10cm" svg:height="2.5cm" svg:x="9cm" svg:y="1.25cm" presentation:class="title">
          <draw:text-box>
            <text:p><text:span text:style-name="T2">Slipshow</text:span></text:p>
          </draw:text-box>
        </draw:frame>
        <draw:custom-shape draw:style-name="gr12" draw:text-style-name="P14"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1" draw:layer="layout" svg:width="23cm" svg:height="10cm" svg:x="2.5cm" svg:y="4cm" presentation:class="outline" presentation:user-transformed="true">
          <draw:text-box>
            <text:list text:style-name="L3">
              <text:list-item>
                <text:p><text:span text:style-name="T2">Example :</text:span></text:p>
              </text:list-item>
            </text:list>
          </draw:text-box>
        </draw:frame>
        <anim:par presentation:node-type="timing-root">
          <anim:par smil:begin="id14.begin">
            <anim:transitionFilter smil:dur="2s" smil:type="miscShapeWipe" smil:subtype="heart"/>
          </anim:par>
          <anim:seq smil:dur="0s" presentation:node-type="main-sequence"/>
        </anim:par>
        <presentation:notes draw:style-name="dp2">
          <draw:page-thumbnail draw:style-name="gr6" draw:layer="layout" svg:width="17cm" svg:height="9.56cm" svg:x="2cm" svg:y="2.5cm" draw:page-number="3" presentation:class="page"/>
          <draw:frame presentation:style-name="pr2" draw:text-style-name="P1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Bold" style:font-family-generic="swiss"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23" draw:display-name="Bitmap 23" xlink:href="Pictures/100000000000000800000008BD9B8880.png" xlink:type="simple" xlink:show="embed" xlink:actuate="onLoad"/>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T18H25M52S</meta:editing-duration>
    <meta:editing-cycles>24</meta:editing-cycles>
    <meta:generator>LibreOffice/24.8.2.1$Linux_X86_64 LibreOffice_project/480$Build-1</meta:generator>
    <dc:title>Sunset</dc:title>
    <dc:date>2024-11-16T10:41:27.239356155</dc:date>
    <meta:document-statistic meta:object-count="53"/>
  </office:meta>
</office:document-meta>
</file>